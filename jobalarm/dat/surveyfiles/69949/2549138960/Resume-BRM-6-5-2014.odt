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Bernhard Modern" svg:font-family="'Bernhard Modern'" style:font-family-generic="roman"/>
    <style:font-face style:name="Garamond" svg:font-family="Garamond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7.0729in" fo:margin-left="-0.0799in" table:align="left" style:writing-mode="lr-tb"/>
    </style:style>
    <style:style style:name="Table1.A" style:family="table-column">
      <style:table-column-properties style:column-width="2.3201in"/>
    </style:style>
    <style:style style:name="Table1.B" style:family="table-column">
      <style:table-column-properties style:column-width="2.5097in"/>
    </style:style>
    <style:style style:name="Table1.C" style:family="table-column">
      <style:table-column-properties style:column-width="2.24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069in" fo:padding-right="0.0069in" fo:padding-top="0in" fo:padding-bottom="0in" fo:border="none"/>
    </style:style>
    <style:style style:name="Table2" style:family="table">
      <style:table-properties style:width="6.9792in" fo:margin-left="-0.0799in" table:align="left" style:writing-mode="lr-tb"/>
    </style:style>
    <style:style style:name="Table2.A" style:family="table-column">
      <style:table-column-properties style:column-width="5.066in"/>
    </style:style>
    <style:style style:name="Table2.B" style:family="table-column">
      <style:table-column-properties style:column-width="1.913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069in" fo:padding-right="0.0069in" fo:padding-top="0in" fo:padding-bottom="0in" fo:border="none"/>
    </style:style>
    <style:style style:name="Table3" style:family="table">
      <style:table-properties style:width="6.9792in" fo:margin-left="-0.0799in" table:align="left" style:writing-mode="lr-tb"/>
    </style:style>
    <style:style style:name="Table3.A" style:family="table-column">
      <style:table-column-properties style:column-width="5.066in"/>
    </style:style>
    <style:style style:name="Table3.B" style:family="table-column">
      <style:table-column-properties style:column-width="1.913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069in" fo:padding-right="0.0069in" fo:padding-top="0in" fo:padding-bottom="0in" fo:border="none"/>
    </style:style>
    <style:style style:name="Table4" style:family="table">
      <style:table-properties style:width="6.9792in" fo:margin-left="-0.0799in" table:align="left" style:writing-mode="lr-tb"/>
    </style:style>
    <style:style style:name="Table4.A" style:family="table-column">
      <style:table-column-properties style:column-width="5.066in"/>
    </style:style>
    <style:style style:name="Table4.B" style:family="table-column">
      <style:table-column-properties style:column-width="1.913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069in" fo:padding-right="0.0069in" fo:padding-top="0in" fo:padding-bottom="0in" fo:border="none"/>
    </style:style>
    <style:style style:name="Table5" style:family="table">
      <style:table-properties style:width="6.9792in" fo:margin-left="-0.0799in" table:align="left" style:writing-mode="lr-tb"/>
    </style:style>
    <style:style style:name="Table5.A" style:family="table-column">
      <style:table-column-properties style:column-width="5.066in"/>
    </style:style>
    <style:style style:name="Table5.B" style:family="table-column">
      <style:table-column-properties style:column-width="1.9132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069in" fo:padding-right="0.0069in" fo:padding-top="0in" fo:padding-bottom="0in" fo:border="none"/>
    </style:style>
    <style:style style:name="P1" style:family="paragraph" style:parent-style-name="Standard" style:list-style-name="">
      <style:paragraph-properties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Standard" style:list-style-name="">
      <style:paragraph-properties style:text-autospace="none"/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 style:list-style-name="">
      <style:paragraph-properties fo:margin-top="0.1945in" fo:margin-bottom="0.1402in" style:line-height-at-least="0.1701in" fo:text-align="center" style:justify-single-word="false" style:text-autospace="none"/>
      <style:text-properties style:font-name="Times New Roman1" fo:font-size="22pt" style:font-name-asian="Times New Roman1" style:font-size-asian="22pt" style:font-name-complex="Times New Roman1" style:font-size-complex="22pt"/>
    </style:style>
    <style:style style:name="P4" style:family="paragraph" style:parent-style-name="Standard" style:list-style-name="">
      <style:paragraph-properties fo:margin-top="0.1945in" fo:margin-bottom="0.1098in" fo:text-align="center" style:justify-single-word="false" style:text-autospace="none"/>
    </style:style>
    <style:style style:name="P5" style:family="paragraph" style:parent-style-name="Standard" style:list-style-name="">
      <style:paragraph-properties fo:margin-top="0.1945in" fo:margin-bottom="0.1098in" style:text-autospace="none"/>
    </style:style>
    <style:style style:name="P6" style:family="paragraph" style:parent-style-name="Standard" style:list-style-name="">
      <style:paragraph-properties fo:margin-top="0.1945in" fo:margin-bottom="0.1098in" style:text-autospace="non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 style:list-style-name="">
      <style:paragraph-properties fo:margin-top="0.1945in" fo:margin-bottom="0.1098in" style:text-autospace="none"/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margin-top="0.1945in" fo:margin-bottom="0.1098in" style:text-autospace="none"/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" style:family="paragraph" style:parent-style-name="Standard" style:list-style-name="">
      <style:paragraph-properties fo:margin-top="0.1098in" fo:margin-bottom="0.1098in" fo:text-align="center" style:justify-single-word="false" fo:background-color="#ffffff" fo:padding-left="0in" fo:padding-right="0in" fo:padding-top="0.028in" fo:padding-bottom="0.028in" fo:border-left="none" fo:border-right="none" fo:border-top="0.0008in solid #000000" fo:border-bottom="0.0138in solid #000000" style:text-autospace="none">
        <style:background-image/>
      </style:paragraph-properties>
      <style:text-properties style:font-name="Garamond" fo:font-size="13.5pt" fo:font-weight="bold" style:font-name-asian="Garamond" style:font-size-asian="13.5pt" style:font-weight-asian="bold" style:font-name-complex="Garamond" style:font-size-complex="13.5pt" style:font-weight-complex="bold"/>
    </style:style>
    <style:style style:name="P10" style:family="paragraph" style:parent-style-name="Standard" style:list-style-name="">
      <style:paragraph-properties fo:margin-top="0.1098in" fo:margin-bottom="0.1098in" fo:text-align="center" style:justify-single-word="false" fo:background-color="#ffffff" fo:padding-left="0in" fo:padding-right="0in" fo:padding-top="0.028in" fo:padding-bottom="0.028in" fo:border-left="none" fo:border-right="none" fo:border-top="0.0008in solid #000000" fo:border-bottom="0.0138in solid #000000" style:text-autospace="none">
        <style:background-image/>
      </style:paragraph-properties>
      <style:text-properties style:font-name="Garamond" fo:font-size="13.5pt" fo:font-style="normal" fo:font-weight="bold" style:font-name-asian="Garamond" style:font-size-asian="13.5pt" style:font-style-asian="normal" style:font-weight-asian="bold" style:font-name-complex="Garamond" style:font-size-complex="13.5pt" style:font-style-complex="normal" style:font-weight-complex="bold"/>
    </style:style>
    <style:style style:name="P11" style:family="paragraph" style:parent-style-name="Standard" style:list-style-name="">
      <style:paragraph-properties fo:margin-top="0in" fo:margin-bottom="0.0098in" style:text-autospace="non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 style:list-style-name="">
      <style:paragraph-properties fo:margin-top="0.1945in" fo:margin-bottom="0.0098in" style:text-autospace="non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 style:list-style-name="">
      <style:paragraph-properties fo:margin-top="0.1945in" fo:margin-bottom="0.0799in" style:text-autospace="non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 style:list-style-name="">
      <style:paragraph-properties fo:margin-top="0in" fo:margin-bottom="0.0799in" style:text-autospace="non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 style:list-style-name="">
      <style:paragraph-properties fo:margin-top="0in" fo:margin-bottom="0.0799in" fo:text-align="end" style:justify-single-word="false" style:text-autospace="non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 style:list-style-name="">
      <style:paragraph-properties fo:margin-top="0in" fo:margin-bottom="0.0799in" style:text-autospace="none"/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tandard" style:list-style-name="">
      <style:paragraph-properties fo:margin-top="0in" fo:margin-bottom="0.0799in" fo:text-align="end" style:justify-single-word="false" style:text-autospace="none"/>
      <style:text-properties style:font-name="Times New Roman1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8" style:family="paragraph" style:parent-style-name="Standard" style:list-style-name="">
      <style:paragraph-properties fo:margin-top="0in" fo:margin-bottom="0.0799in" fo:text-align="end" style:justify-single-word="false" style:text-autospace="none"/>
      <style:text-properties style:font-name="Times New Roman1" fo:font-size="6pt" fo:font-style="normal" fo:font-weight="bold" style:font-name-asian="Times New Roman1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P19" style:family="paragraph" style:parent-style-name="Standard" style:list-style-name="">
      <style:paragraph-properties fo:margin-top="0.0299in" fo:margin-bottom="0in" style:text-autospace="none"/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 style:list-style-name="">
      <style:paragraph-properties fo:margin-top="0.0299in" fo:margin-bottom="0in" style:text-autospace="none"/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5" style:family="text"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style:font-name="Times New Roman1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7" style:family="text"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8" style:family="text">
      <style:text-properties style:font-name="Times New Roman1" fo:font-size="6pt" fo:font-style="normal" fo:font-weight="bold" style:font-name-asian="Times New Roman1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T9" style:family="text">
      <style:text-properties style:font-name="Wingdings" fo:font-size="6pt" style:font-name-asian="Wingdings" style:font-size-asian="6pt" style:font-name-complex="Wingdings" style:font-size-complex="6pt"/>
    </style:style>
    <style:style style:name="T10" style:family="text">
      <style:text-properties style:font-name="Garamond" fo:font-size="13.5pt" fo:font-weight="bold" style:font-name-asian="Garamond" style:font-size-asian="13.5pt" style:font-weight-asian="bold" style:font-name-complex="Garamond" style:font-size-complex="13.5pt" style:font-weight-complex="bold"/>
    </style:style>
    <style:style style:name="T11" style:family="text">
      <style:text-properties style:font-name="Garamond" fo:font-size="13.5pt" fo:font-style="normal" fo:font-weight="bold" style:font-name-asian="Garamond" style:font-size-asian="13.5pt" style:font-style-asian="normal" style:font-weight-asian="bold" style:font-name-complex="Garamond" style:font-size-complex="13.5pt" style:font-style-complex="normal" style:font-weight-complex="bold"/>
    </style:style>
    <style:style style:name="T12" style:family="text"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font-name="Bernhard Modern" fo:font-size="14pt" fo:font-style="normal" fo:font-weight="bold" style:font-name-asian="Bernhard Modern" style:font-size-asian="14pt" style:font-style-asian="normal" style:font-weight-asian="bold" style:font-name-complex="Bernhard Modern" style:font-size-complex="14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3">BRITTON R. MYERS</text:p>
      <text:p text:style-name="P4"><text:span text:style-name="T1">212 Chelsea Drive </text:span><text:span text:style-name="T9">l</text:span><text:span text:style-name="T1"> Hewitt, TX 76643 </text:span><text:span text:style-name="T9">l</text:span><text:span text:style-name="T1"> 254-913-8960</text:span><text:span text:style-name="T9">l</text:span><text:span text:style-name="T1"> brttnmyr@aol.com</text:span></text:p>
      <text:p text:style-name="P9">Supervisor/Manager/Technician</text:p>
      <text:p text:style-name="P6">Goal oriented professional with a strong analytical health background and education. <text:s/>I am a highly motivated individual with excellent sales and technical skills.</text:p>
      <text:p text:style-name="P9">Key Skil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Office Management</text:p>
            <text:p text:style-name="P12">Teambuilding &amp; Supervision</text:p>
            <text:p text:style-name="P12">Staff Development &amp; Training</text:p>
            <text:p text:style-name="P13">Policies &amp; Procedures Manuals</text:p>
          </table:table-cell>
          <table:table-cell table:style-name="Table1.A1" office:value-type="string">
            <text:p text:style-name="P11">Report &amp; Document Preparation</text:p>
            <text:p text:style-name="P12">Spreadsheet &amp; Database Creation</text:p>
            <text:p text:style-name="P12">Previous QC skills in Water Treatment and Testing</text:p>
          </table:table-cell>
          <table:table-cell table:style-name="Table1.A1" office:value-type="string">
            <text:p text:style-name="P11">Problem Solving</text:p>
            <text:p text:style-name="P12">Analytical Skills</text:p>
            <text:p text:style-name="P12">Microsoft Products</text:p>
            <text:p text:style-name="P13">Excel</text:p>
          </table:table-cell>
        </table:table-row>
      </table:table>
      <text:p text:style-name="P9">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MYERS CHIROPRACTIC &amp; WELLNESS CENTER, WACO, TEXAS</text:p>
            <text:p text:style-name="P14">Physical Office Closed</text:p>
          </table:table-cell>
          <table:table-cell table:style-name="Table2.A1" office:value-type="string">
            <text:p text:style-name="P15">March 2004 to Present</text:p>
          </table:table-cell>
        </table:table-row>
      </table:table>
      <text:p text:style-name="P19">Office Owner/Manager</text:p>
      <text:list xml:id="list3817991836269451667" text:style-name="L1">
        <text:list-item>
          <text:p text:style-name="P8">Reviewed and processed insurance claims for complex accounts, high <text:line-break/>dollar amounts, intricate carrier contracts and specialized clinical <text:line-break/>departments. <text:line-break/>* Received, researched, and resolved correspondence from all <text:line-break/>organizations and patients. <text:line-break/>* Identified problems and inconsistencies utilizing management reports, researched problems, summarized findings. <text:line-break/>* An ability to form innovative treatment plans to serve patients.. <text:line-break/>* Trained staff on benefit information and other pertinent information as <text:line-break/>it relates to claims processing and patient care. <text:line-break/>* Defined problems, determined work sequence and summarizes findings. <text:line-break/>* Wrote procedures and reference guides. <text:line-break/>* Interact with other healthcare practitioners on a professional level to obtain satisfactory outcomes.</text:p>
          <text:p text:style-name="P8"/>
        </text:list-item>
      </text:list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6">CHIROPRACTOR, WACO, TEXAS</text:p>
            <text:p text:style-name="P16">ALLIED MULTICARE CENTERS </text:p>
          </table:table-cell>
          <table:table-cell table:style-name="Table3.A1" office:value-type="string">
            <text:p text:style-name="P17">December 2001 to January 2004</text:p>
          </table:table-cell>
        </table:table-row>
      </table:table>
      <text:p text:style-name="P19">Associate Chiropractor</text:p>
      <text:p text:style-name="P5"><text:span text:style-name="T5">* </text:span><text:span text:style-name="T5">Ability to form innovative treatment plans to serve patients. </text:span><text:span text:style-name="T5"><text:line-break/>* Performed other duties such as medical testimony (written and in-person).</text:span></text:p>
      <text:p text:style-name="P7">-Reason for Leaving-Contract complete; Pursued self employment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FREIGHT SALES/MANAGEMENT, DALLAS, AMARILLO, TEXAS</text:p>
            <text:p text:style-name="P16">NW TRANSPORT-DENVER, COLORADO </text:p>
          </table:table-cell>
          <table:table-cell table:style-name="Table4.A1" office:value-type="string">
            <text:p text:style-name="P17">June 1995 to May 1998</text:p>
          </table:table-cell>
        </table:table-row>
      </table:table>
      <text:p text:style-name="P19">Terminal Manager-Panhandle Region of Texas, Eastern New Mexico</text:p>
      <text:p text:style-name="P5"><text:span text:style-name="T5">* Terminal Manager based in Amarillo, Texas</text:span><text:span text:style-name="T5">. <text:s text:c="90"/>* Responsible for sales and controlled inbound and outbound freight. <text:s text:c="53"/>* Managed union personnel. <text:s text:c="7"/></text:span><text:span text:style-name="T5"><text:line-break/>* Freight sales of the north Fort Worth Territory based out of Dallas, Texas.</text:span><text:span text:style-name="T13"> <text:s/></text:span><text:span text:style-name="T5"><text:s/><text:line-break/>* </text:span><text:span text:style-name="T5">Responsible for sales and followed and expedited inbound and outbound freight</text:span><text:span text:style-name="T7">.</text:span><text:span text:style-name="T13"> <text:s/></text:span><text:span text:style-name="T5"><text:s/><text:line-break/>* Maintained a professional relationship with local and corporate management. <text:s text:c="13"/><text:tab/></text:span></text:p>
      <text:p text:style-name="P7">-Reason for Leaving-Pursued Chiropractic education.</text:p>
      <text:p text:style-name="P10">Education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TEXAS TECH UNIVERSITY – LUBBOCK, TEXAS <text:s text:c="52"/>Bachelor of Science-Biology</text:p>
            <text:p text:style-name="P16">PARKER COLLEGE OF CHIROPRACTIC – DALLAS, TEXAS Doctorate of Chiropractic</text:p>
            <text:p text:style-name="P16">WAYLAND BAPTIST UNIVERSITY – SAN ANTONIO, TEXAS Bachelor of Science-Nursing</text:p>
          </table:table-cell>
          <table:table-cell table:style-name="Table5.A1" office:value-type="string">
            <text:p text:style-name="P17">December 1991</text:p>
            <text:p text:style-name="P18"/>
            <text:p text:style-name="P17">May 2001</text:p>
            <text:p text:style-name="P18"/>
            <text:p text:style-name="P17">March 2013</text:p>
          </table:table-cell>
        </table:table-row>
      </table:table>
      <text:p text:style-name="P7"/>
      <text:p text:style-name="P10">References</text:p>
      <text:p text:style-name="P20"/>
      <text:p text:style-name="P2">Mrs. Paulette Pendley <text:s/><text:tab/><text:tab/>254-744-4503</text:p>
      <text:p text:style-name="P2"><text:tab/><text:tab/></text:p>
      <text:p text:style-name="P2">Dr. Jeff Smith <text:s/><text:tab/><text:tab/><text:tab/>512-221-7288</text:p>
      <text:p text:style-name="P2"/>
      <text:p text:style-name="P2">Mr. Denton Lessman <text:s/><text:tab/><text:tab/>254-776-4544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Bernhard Modern" svg:font-family="'Bernhard Modern'" style:font-family-generic="roman"/>
    <style:font-face style:name="Garamond" svg:font-family="Garamond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3:14:13.47</meta:creation-date>
    <dc:date>2014-06-05T13:18:02.98</dc:date>
    <meta:editing-duration>PT4M5S</meta:editing-duration>
    <meta:editing-cycles>2</meta:editing-cycles>
    <meta:generator>OpenOffice.org/3.4$Win32 OpenOffice.org_project/340m1$Build-9590</meta:generator>
    <meta:document-statistic meta:table-count="5" meta:image-count="0" meta:object-count="0" meta:page-count="2" meta:paragraph-count="46" meta:word-count="366" meta:character-count="2928"/>
  </office:meta>
</office:document-meta>
</file>