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2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3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Shaitiera T. Henderson</text:p>
      <text:p text:style-name="Standard"><text:tab/><text:tab/><text:tab/>10928 Audelia Rd Apt#1722 Dallas, Tx 75243</text:p>
      <text:p text:style-name="Standard"><text:tab/><text:tab/><text:tab/> <text:s/>757-593-0696Email: <text:a xlink:type="simple" xlink:href="mailto:Hatgurl11@gmail.com">Hatgurl11@gmail.com</text:a></text:p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Customer Service Speacialist </text:span></text:p>
      <text:p text:style-name="P2"><text:tab/><text:tab/></text:p>
      <text:p text:style-name="P2"><text:tab/><text:tab/>Creating the Ulitimate Customer Experience with Personailty and Proffesionalism </text:p>
      <text:p text:style-name="P2"/>
      <text:p text:style-name="P2"/>
      <text:p text:style-name="P2"><text:tab/><text:tab/>(Multi-Tasker in Communication)<text:tab/><text:tab/>(Profficient in Microsoft Office)</text:p>
      <text:p text:style-name="P2"><text:tab/><text:tab/><text:tab/><text:tab/></text:p>
      <text:p text:style-name="P2"><text:tab/><text:tab/><text:tab/>(Data Entry Counseling)<text:tab/><text:tab/><text:tab/>(Call Handling)</text:p>
      <text:p text:style-name="P2"/>
      <text:p text:style-name="P2"/>
      <text:p text:style-name="P2"/>
      <text:p text:style-name="P2"><text:tab/><text:tab/><text:tab/><text:tab/><text:tab/><text:span text:style-name="T1">Employment History</text:span></text:p>
      <text:p text:style-name="P4"/>
      <text:p text:style-name="P2"><text:tab/><text:tab/>Most Recent:</text:p>
      <text:p text:style-name="P2"/>
      <text:p text:style-name="P2"/>
      <text:p text:style-name="P2"><text:tab/><text:tab/><text:span text:style-name="T2">Williamburg Plantation, Newprot News VA 23601</text:span></text:p>
      <text:p text:style-name="P5"><text:tab/><text:tab/>10/2013-11/2014</text:p>
      <text:list xml:id="list26584066" text:style-name="L1">
        <text:list-header>
          <text:p text:style-name="P6">Customer service Representative </text:p>
        </text:list-header>
        <text:list-item>
          <text:p text:style-name="P6">Made outbound calls to list of potenitial canidates in refrence to Timeshares and Vacations.</text:p>
        </text:list-item>
        <text:list-item>
          <text:p text:style-name="P6">Provided exceptional Customer service to inbound and outbound customers.</text:p>
        </text:list-item>
        <text:list-item>
          <text:p text:style-name="P6">Demonstrated working knowledge of computer and internet navigation</text:p>
        </text:list-item>
        <text:list-item>
          <text:p text:style-name="P6">Displayed strong communication and problem solving skills</text:p>
        </text:list-item>
        <text:list-item>
          <text:p text:style-name="P6">Resolved customer question/ concerns as well as requests</text:p>
        </text:list-item>
        <text:list-item>
          <text:p text:style-name="P6">Worker the meccasary amount of overtime to meet the needs of the company and remained flexible with scheduling </text:p>
        </text:list-item>
      </text:list>
      <text:p text:style-name="P5"/>
      <text:p text:style-name="P5"><text:tab/><text:tab/>Powell staffing soultions(Temp Service)Newport News, 23601</text:p>
      <text:p text:style-name="P5"><text:tab/><text:tab/>08/2012-04/2013</text:p>
      <text:p text:style-name="P5"><text:tab/><text:tab/><text:tab/>Dining Room/ Housekeeper</text:p>
      <text:list xml:id="list26614749" text:style-name="L2">
        <text:list-item>
          <text:p text:style-name="P9">Clean rooms and bathroom with prescribed equipment and to required standards</text:p>
        </text:list-item>
        <text:list-item>
          <text:p text:style-name="P9">Replace and supply tolietries on regular basis </text:p>
        </text:list-item>
        <text:list-item>
          <text:p text:style-name="P7">Report repairs where necessary</text:p>
        </text:list-item>
        <text:list-item>
          <text:p text:style-name="P7">Collect food trays from rooms/Dining hall and return them to the kicthen</text:p>
        </text:list-item>
        <text:list-item>
          <text:p text:style-name="P7">clean spills in room, dining hall and other parts </text:p>
        </text:list-item>
        <text:list-item>
          <text:p text:style-name="P7">Dispose off trash in enviormental friendly manner</text:p>
        </text:list-item>
      </text:list>
      <text:p text:style-name="P5"><text:tab/><text:tab/>Hardee's inc, Newport News VA 23606<text:tab/></text:p>
      <text:p text:style-name="P5"><text:soft-page-break/><text:tab/><text:tab/>04/2011-10/2012</text:p>
      <text:p text:style-name="P5"><text:tab/><text:tab/>Drive-thru/Cashier</text:p>
      <text:list xml:id="list26598137" text:style-name="L3">
        <text:list-item>
          <text:p text:style-name="P8">Responsible for taking customer orders as well as providing satisfactory customer service to customers face to face or over intercome</text:p>
        </text:list-item>
        <text:list-item>
          <text:p text:style-name="P8">Effectivly upsold new items and created a great customer experience to all customer at the location</text:p>
        </text:list-item>
        <text:list-item>
          <text:p text:style-name="P8">Maintained a proffesional apperance and presentable store front for ulitamate customer experience </text:p>
        </text:list-item>
        <text:list-item>
          <text:p text:style-name="P8">Cross trained as back line cook and back line prep</text:p>
        </text:list-item>
      </text:list>
      <text:p text:style-name="P5"/>
      <text:p text:style-name="P5"/>
      <text:p text:style-name="P5"/>
      <text:p text:style-name="Standard"><text:span text:style-name="T3"><text:tab/><text:tab/><text:tab/><text:tab/><text:tab/><text:tab/></text:span><text:span text:style-name="T4">Education</text:span></text:p>
      <text:p text:style-name="P1"><text:span text:style-name="T5"><text:tab/><text:tab/><text:tab/></text:span><text:span text:style-name="T6">High school graduate</text:span><text:span text:style-name="T5"> </text:span></text:p>
      <text:p text:style-name="P3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eca  Williams</meta:initial-creator>
    <meta:creation-date>2015-01-19T20:59:47.62</meta:creation-date>
    <dc:date>2015-01-20T06:43:44.28</dc:date>
    <dc:creator>Jesseca  Williams</dc:creator>
    <meta:editing-duration>PT4M4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39" meta:word-count="261" meta:character-count="1876"/>
  </office:meta>
</office:document-meta>
</file>