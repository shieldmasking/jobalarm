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3" style:family="paragraph" style:parent-style-name="Standard">
      <style:paragraph-properties fo:margin-top="0.0693in" fo:margin-bottom="0.0693i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.0693in" fo:margin-bottom="0.0693in" fo:text-align="center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ichard L. Young <text:line-break/>109 Whispering Pine LN<text:line-break/>White GA 30184<text:line-break/>(H) N/A <text:line-break/>(C) 678-767-2657 <text:line-break/>E-Mail richardyoung071967@yahoo.com <text:line-break/><text:line-break/><text:line-break/>Employment History </text:p>
      <text:p text:style-name="P3">July 1,2011 to April 2013 <text:s text:c="134"/>Meineke Car care center <text:s text:c="120"/>Store Manager . Responsible for day-to-day operations</text:p>
      <text:p text:style-name="P3"><text:line-break/>June 18,2008 - 07/ 2011 <text:s text:c="116"/>Young’s Trucking Owner and Operator</text:p>
      <text:p text:style-name="P4"><text:line-break/>September;14.2006-06/2008<text:line-break/>Heard Trucking; OTR First Set Driver Of All 48 States <text:line-break/><text:line-break/>2003-2006 <text:line-break/>NO Job do to medical <text:line-break/><text:line-break/>1994-2003<text:line-break/>Econo-Lube and Tune: Traveling National Operations Manager responsible for oversight of repossessed and returned franchises. Duties included hiring staff and training of management and franchise owners. <text:line-break/><text:line-break/>1989-1994 <text:line-break/>Econo-Lube and Tune: Store Manager. Responsible for day-to-day operations of the franchise. Duties included hiring, troubleshooting automotive problems, financial management and inventory. <text:line-break/><text:line-break/>Education <text:line-break/>1985-1989 <text:line-break/>Cobb County, GA Vocational-Technical School. Successfully completed certification programs in Automotive Technology and HVAC Technology. <text:line-break/><text:line-break/>1984 <text:line-break/>Awarded Georgia GED Diploma <text:line-break/><text:line-break/><text:line-break/>References Available upon request. <text:line-break/>Econo Lube -N- Tune 1-800-478-3795<text:line-break/></text:p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21:28:00.43</meta:creation-date>
    <dc:date>2013-10-14T22:23:40.49</dc:date>
    <meta:editing-duration>PT2H11M31S</meta:editing-duration>
    <meta:editing-cycles>4</meta:editing-cycles>
    <meta:generator>OpenOffice.org/3.4.1$Win32 OpenOffice.org_project/341m1$Build-9593</meta:generator>
    <meta:print-date>2013-10-14T21:00:04.06</meta:print-date>
    <meta:document-statistic meta:table-count="0" meta:image-count="0" meta:object-count="0" meta:page-count="1" meta:paragraph-count="4" meta:word-count="142" meta:character-count="1477"/>
  </office:meta>
</office:document-meta>
</file>