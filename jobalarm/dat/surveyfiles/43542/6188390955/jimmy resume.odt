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entury Gothic'" style:font-family-asian="'Century Gothic'" style:font-family-complex="'Century Gothic'" fo:background-color="transparent" style:use-window-font-color="true" fo:font-variant="small-caps"/>
    </style:style>
    <style:style style:name="T2" style:family="text">
      <style:text-properties fo:font-size="11.00pt" fo:font-weight="normal" fo:font-family="'Century Gothic'" style:font-family-asian="'Century Gothic'" style:font-family-complex="'Century Gothic'"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4" style:family="text">
      <style:text-properties fo:font-size="11.00pt" fo:font-weight="normal" fo:font-family="'Century Gothic'" style:font-family-asian="'Century Gothic'" style:font-family-complex="'Century Gothic'"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6" style:family="text">
      <style:text-properties fo:font-size="11.00pt" fo:font-weight="bold" fo:font-family="'Century Gothic'" style:font-family-asian="'Century Gothic'" style:font-family-complex="'Century Gothic'" fo:background-color="transparent" style:use-window-font-color="true"/>
    </style:style>
    <style:style style:name="T7" style:family="text">
      <style:text-properties fo:font-size="11.00pt" fo:font-weight="normal" fo:font-family="'Century Gothic'" style:font-family-asian="'Century Gothic'" style:font-family-complex="'Century Gothic'" fo:background-color="transparent" style:use-window-font-color="true" fo:font-style="italic"/>
    </style:style>
    <style:style style:name="T8"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9" style:family="text">
      <style:text-properties fo:font-size="11.00pt" fo:font-weight="bold" fo:font-family="'Century Gothic'" style:font-family-asian="'Century Gothic'" style:font-family-complex="'Century Gothic'" fo:background-color="transparent" style:use-window-font-color="true"/>
    </style:style>
    <style:style style:name="T10" style:family="text">
      <style:text-properties fo:font-size="11.00pt" fo:font-weight="normal" fo:font-family="'Century Gothic'" style:font-family-asian="'Century Gothic'" style:font-family-complex="'Century Gothic'" fo:background-color="transparent" style:use-window-font-color="true"/>
    </style:style>
    <style:style style:name="T11"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12" style:family="text">
      <style:text-properties fo:font-size="11.00pt" fo:font-weight="bold" fo:font-family="'Century Gothic'" style:font-family-asian="'Century Gothic'" style:font-family-complex="'Century Gothic'" fo:background-color="transparent" style:use-window-font-color="true" fo:font-style="italic"/>
    </style:style>
    <style:style style:name="T13" style:family="text">
      <style:text-properties fo:font-size="11.00pt" fo:font-weight="normal" fo:font-family="'Century Gothic'" style:font-family-asian="'Century Gothic'" style:font-family-complex="'Century Gothic'" fo:background-color="transparent" style:use-window-font-color="true"/>
    </style:style>
    <style:style style:name="T14"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15" style:family="text">
      <style:text-properties fo:font-size="11.00pt" fo:font-weight="normal" fo:font-family="'Century Gothic'" style:font-family-asian="'Century Gothic'" style:font-family-complex="'Century Gothic'" fo:background-color="transparent" style:use-window-font-color="true"/>
    </style:style>
    <style:style style:name="T16"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17" style:family="text">
      <style:text-properties fo:font-size="11.00pt" fo:font-weight="normal" fo:font-family="'Century Gothic'" style:font-family-asian="'Century Gothic'" style:font-family-complex="'Century Gothic'" fo:background-color="transparent" style:use-window-font-color="true"/>
    </style:style>
    <style:style style:name="T18" style:family="text">
      <style:text-properties fo:font-size="11.00pt" fo:font-weight="bold" style:text-underline-mode="continuous" style:text-underline-type="single" style:text-underline-style="solid" style:text-underline-width="normal" fo:font-family="'Century Gothic'" style:font-family-asian="'Century Gothic'" style:font-family-complex="'Century Gothic'" fo:background-color="transparent" style:use-window-font-color="true" fo:font-style="italic"/>
    </style:style>
    <style:style style:name="T19" style:family="text">
      <style:text-properties fo:font-size="11.00pt" fo:font-weight="normal" fo:font-family="'Century Gothic'" style:font-family-asian="'Century Gothic'" style:font-family-complex="'Century Gothic'" fo:background-color="transparent" style:use-window-font-color="true"/>
    </style:style>
    <style:style style:name="T20" style:family="text">
      <style:text-properties fo:font-size="11.00pt" fo:font-weight="bold" fo:font-family="'Century Gothic'" style:font-family-asian="'Century Gothic'" style:font-family-complex="'Century Gothic'" fo:background-color="transparent" style:use-window-font-color="true" fo:font-variant="small-caps"/>
    </style:style>
    <style:style style:name="T21" style:family="text">
      <style:text-properties fo:font-size="11.00pt" fo:font-weight="normal" fo:font-family="'Century Gothic'" style:font-family-asian="'Century Gothic'" style:font-family-complex="'Century Gothic'"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fo:margin-left="36.00pt" fo:text-indent="0.00pt"/>
    </style:style>
  </office:automatic-styles>
  <office:body>
    <office:text>
      <text:p text:style-name="P1"><text:span text:style-name="T1">James E. Sessions</text:span></text:p>
      <text:p text:style-name="P1"><text:span text:style-name="T2">Sessions Welding </text:span></text:p>
      <text:p text:style-name="P1"><text:span text:style-name="T2">48 Blackberry Drive Clay City, Illinois 62824</text:span></text:p>
      <text:p text:style-name="P1"><text:span text:style-name="T2">618-839-4022</text:span></text:p>
      <text:p text:style-name="P2"><text:span text:style-name="T2">Email sessionsjimmy@yahoo.com</text:span></text:p>
      <text:p text:style-name="P3"><text:span text:style-name="T3">Objective<text:s/></text:span><text:span text:style-name="T4">To obtain employment as a welder with an established company.</text:span></text:p>
      <text:p text:style-name="P3"><text:span text:style-name="T4"/></text:p>
      <text:p text:style-name="P3"><text:span text:style-name="T5"/></text:p>
      <text:p text:style-name="P3"><text:span text:style-name="T5">Education</text:span></text:p>
      <text:p text:style-name="P3"><text:span text:style-name="T6">Southeastern Illinois College Harrisburg, Illinois 1996-1998</text:span></text:p>
      <text:p text:style-name="P3"><text:span text:style-name="T7">Certificates: Industrial safety, occupational math, electrical theory, industrial wiring, basic mechanical skills, industrial plant maintenance, industrial welding, advanced arc welding, basic pipe trades, hydraulics, blue print reading, mechanical systems, machine tool fundamentals, metallurgy and heat treatment, Industrial plant maintenance welding.</text:span></text:p>
      <text:p text:style-name="P3"><text:span text:style-name="T8"/></text:p>
      <text:p text:style-name="P3"><text:span text:style-name="T8"/></text:p>
      <text:p text:style-name="P3"><text:span text:style-name="T8">Experience</text:span></text:p>
      <text:p text:style-name="P3"><text:span text:style-name="T9">Sessions Welding Clay City, Illinois 2005- present day.</text:span></text:p>
      <text:p text:style-name="P3"><text:span text:style-name="T9">Owner/ Operator<text:tab/></text:span><text:span text:style-name="T10"/></text:p>
      <text:list text:style-name="L4">
        <text:list-item>
          <text:p text:style-name="P4"><text:span text:style-name="T10">Fabricate and repair services for the oil/commercial/industrial/agricultural industries in the Clay County and surrounding area. Utilization of Mig, Stick, Brazing and Cutting on all types of metals. Experience in shop and field environments including hazardous terrain and inclement weather. </text:span></text:p>
        </text:list-item>
        <text:list-item>
          <text:p text:style-name="P4"><text:span text:style-name="T10">Example of work: Numerous oilfield equipment repairs, aluminum trailers, farm equipment, CAT modifications and repair, fabrication of salt water truck, fabrication of commercial and industrial grade grills (bbq). Numerous city projects consisting of repairs and fabrication. Scrap metal cutting and removal. Fabrication of various dog kennels.</text:span></text:p>
        </text:list-item>
        <text:list-item>
          <text:p text:style-name="P4"><text:span text:style-name="T10">Wide knowledge of the oil industry operations and machinery/tools/equipment. Basic diesel mechanic troubleshooting. Certificates include Industrial Plant Maintenance, Industrial Plant Maintenance Welding, Industrial Safety, Advanced Arc Welding, Machine Tool Fundamentals, Metallurgy &amp; Heat Treatment, Industrial Welding, Hydraulics I, Blue Print Reading, Mechanical Systems, Electrical Theory, Basic Pipe Trades, Applied Industrial Welding, and Basic Mechanical Skills &amp; Occupational Math.</text:span></text:p>
        </text:list-item>
        <text:list-item>
          <text:p text:style-name="P4"><text:span text:style-name="T10">Computer efficient with knowledge of Office, QuickBooks, Email, &amp; Web Design.</text:span></text:p>
        </text:list-item>
      </text:list>
      <text:p text:style-name="P5"><text:span text:style-name="T11"><text:s text:c="4"/></text:span></text:p>
      <text:p text:style-name="P5"><text:span text:style-name="T12">Midwest Soil Remediation Fairfield, April 2013-August 2013 Fabricator/Dirt Burner</text:span></text:p>
      <text:list text:style-name="L6">
        <text:list-item>
          <text:p text:style-name="P6"><text:span text:style-name="T13">Welder/Fabricator : fabrication of a dirt sanitation system.</text:span><text:span text:style-name="T14"/></text:p>
        </text:list-item>
        <text:list-item>
          <text:p text:style-name="P6"><text:span text:style-name="T15">Dirt Burner: set-up, operation and maitenence of dirt sanitation equipment</text:span><text:span text:style-name="T16"/></text:p>
        </text:list-item>
        <text:list-item>
          <text:p text:style-name="P6"><text:span text:style-name="T17">Hazwoper Certified</text:span><text:span text:style-name="T18"/></text:p>
        </text:list-item>
      </text:list>
      <text:p text:style-name="P7"><text:span text:style-name="T18"/></text:p>
      <text:p text:style-name="P7"><text:span text:style-name="T18">Skills<text:tab/></text:span></text:p>
      <text:p text:style-name="P7"><text:span text:style-name="T18"/></text:p>
      <text:p text:style-name="P7"><text:span text:style-name="T19">Welding, cutting, blueprint reading, estimates, operate and service heavy machinery, general construction, modification and fabrication for heavy machinery and heavy equipment. Sandblasting, grinding &amp; painting industrial/agricultural equipment.<text:s/></text:span><text:span text:style-name="T20"/></text:p>
      <text:p text:style-name="P7"><text:span text:style-name="T20"/></text:p>
      <text:p text:style-name="P7"><text:span text:style-name="T20"/></text:p>
      <text:p text:style-name="P7"><text:span text:style-name="T20">References</text:span></text:p>
      <text:p text:style-name="P7"><text:span text:style-name="T20"/></text:p>
      <text:p text:style-name="P7"><text:span text:style-name="T20"/></text:p>
      <text:p text:style-name="P7"><text:span text:style-name="T21"/></text:p>
      <text:p text:style-name="P7"><text:span text:style-name="T21">John Brown Owner</text:span></text:p>
      <text:p text:style-name="P7"><text:span text:style-name="T21">Brown Farms &amp; Brown Oil, Clay City, Illinois.<text:s text:c="17"/>618-839-8507</text:span></text:p>
      <text:p text:style-name="P7"><text:span text:style-name="T21"/></text:p>
      <text:p text:style-name="P7"><text:span text:style-name="T21"/></text:p>
      <text:p text:style-name="P7"><text:span text:style-name="T21">Trevor Busy Mayor</text:span></text:p>
      <text:p text:style-name="P7"><text:span text:style-name="T21">Village of Clay City, Clay City, Illinois<text:s text:c="31"/>618-676-1441<text:s text:c="2"/></text:span></text:p>
      <text:p text:style-name="P7"><text:span text:style-name="T21"/></text:p>
      <text:p text:style-name="P7"><text:span text:style-name="T21"/></text:p>
      <text:p text:style-name="P7"><text:span text:style-name="T21">Darrell Wilson Welder</text:span></text:p>
      <text:p text:style-name="P7"><text:span text:style-name="T21">Self Employed, Clay City, Illinois<text:s text:c="38"/>618-676-5231</text:span></text:p>
      <text:p text:style-name="P7"><text:span text:style-name="T21"/></text:p>
      <text:p text:style-name="P7"><text:span text:style-name="T21"/></text:p>
      <text:p text:style-name="P7"><text:span text:style-name="T21">Tyler Groves Technical Support</text:span></text:p>
      <text:p text:style-name="P7"><text:span text:style-name="T21">North American Lighting, Flora, Illinois<text:s text:c="29"/>618-843-4479</text:span></text:p>
      <text:p text:style-name="P7"><text:span text:style-name="T21"/></text:p>
      <text:p text:style-name="P7"><text:span text:style-name="T21"/></text:p>
      <text:p text:style-name="P7"><text:span text:style-name="T21">Daniel Bridges<text:s text:c="66"/>618-383-6824</text:span></text:p>
      <text:p text:style-name="P7"><text:span text:style-name="T21">Midwest Soil Remediation, Fairfield, Illino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