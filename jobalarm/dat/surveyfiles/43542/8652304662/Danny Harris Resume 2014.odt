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BoldMT" svg:font-family="Arial-BoldMT"/>
    <style:font-face style:name="Mangal1" svg:font-family="Mangal"/>
    <style:font-face style:name="TimesNewRomanPS-BoldMT" svg:font-family="TimesNewRomanPS-BoldMT"/>
    <style:font-face style:name="ArialMT" svg:font-family="ArialMT" style:font-family-generic="swiss"/>
    <style:font-face style:name="ArialUnicodeMS" svg:font-family="ArialUnicodeM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Arial1" fo:font-size="14pt" fo:font-style="italic" fo:font-weight="bold" style:font-name-asian="Arial1" style:font-size-asian="14pt" style:font-style-asian="italic" style:font-weight-asian="bold" style:font-name-complex="Arial-BoldMT" style:font-size-complex="14pt" style:font-style-complex="italic" style:font-weight-complex="bold"/>
    </style:style>
    <style:style style:name="P2" style:family="paragraph" style:parent-style-name="Standard">
      <style:paragraph-properties fo:text-align="start" style:justify-single-word="false" style:text-autospace="none"/>
      <style:text-properties style:font-name="Arial1" fo:font-size="12pt" fo:font-style="italic" fo:font-weight="bold" style:font-name-asian="Arial1" style:font-size-asian="12pt" style:font-style-asian="italic" style:font-weight-asian="bold" style:font-name-complex="Arial-BoldMT" style:font-size-complex="12pt" style:font-style-complex="italic" style:font-weight-complex="bold"/>
    </style:style>
    <style:style style:name="P3" style:family="paragraph" style:parent-style-name="Standard">
      <style:paragraph-properties fo:text-align="start" style:justify-single-word="false" style:text-autospace="none"/>
      <style:text-properties style:font-name="Arial1" fo:font-size="12pt" fo:font-style="italic" fo:font-weight="bold" style:font-name-asian="Arial1" style:font-size-asian="12pt" style:font-style-asian="italic" style:font-weight-asian="bold" style:font-name-complex="TimesNewRomanPS-BoldMT" style:font-size-complex="12pt" style:font-style-complex="italic" style:font-weight-complex="bold"/>
    </style:style>
    <style:style style:name="P4" style:family="paragraph" style:parent-style-name="Standard">
      <style:paragraph-properties fo:text-align="start" style:justify-single-word="false" style:text-autospace="none"/>
      <style:text-properties style:font-name="Arial1" fo:font-size="12pt" fo:font-style="italic" fo:font-weight="bold" style:font-name-asian="Arial1" style:font-size-asian="12pt" style:font-style-asian="italic" style:font-weight-asian="bold" style:font-name-complex="ArialMT" style:font-size-complex="12pt" style:font-style-complex="italic" style:font-weight-complex="bold"/>
    </style:style>
    <style:style style:name="P5" style:family="paragraph" style:parent-style-name="Standard">
      <style:paragraph-properties fo:text-align="start" style:justify-single-word="false" style:text-autospace="none"/>
      <style:text-properties style:font-name="Arial1" fo:font-size="12pt" fo:font-style="italic" style:text-underline-style="solid" style:text-underline-width="auto" style:text-underline-color="font-color" fo:font-weight="bold" style:font-name-asian="Arial1" style:font-size-asian="12pt" style:font-style-asian="italic" style:font-weight-asian="bold" style:font-name-complex="Arial-BoldMT" style:font-size-complex="12pt" style:font-style-complex="italic" style:font-weight-complex="bold"/>
    </style:style>
    <style:style style:name="P6" style:family="paragraph" style:parent-style-name="Standard">
      <style:paragraph-properties fo:text-align="start" style:justify-single-word="false" style:text-autospace="none"/>
      <style:text-properties style:font-name="Arial1" fo:font-size="12pt" fo:font-style="italic" style:font-name-asian="Arial1" style:font-size-asian="12pt" style:font-style-asian="italic" style:font-name-complex="ArialMT" style:font-size-complex="12pt" style:font-style-complex="italic"/>
    </style:style>
    <style:style style:name="P7" style:family="paragraph" style:parent-style-name="Standard">
      <style:paragraph-properties fo:text-align="start" style:justify-single-word="false" style:text-autospace="none"/>
      <style:text-properties style:font-name="Arial1" fo:font-size="12pt" fo:font-style="italic" style:font-name-asian="Arial1" style:font-size-asian="12pt" style:font-style-asian="italic" style:font-name-complex="ArialUnicodeMS" style:font-size-complex="12pt" style:font-style-complex="italic"/>
    </style:style>
    <style:style style:name="P8" style:family="paragraph" style:parent-style-name="Standard">
      <style:paragraph-properties fo:text-align="start" style:justify-single-word="false" style:text-autospace="none"/>
      <style:text-properties style:font-name="Arial1" fo:font-size="12pt" fo:font-style="italic" style:text-underline-style="none" fo:font-weight="bold" style:font-name-asian="Arial1" style:font-size-asian="12pt" style:font-style-asian="italic" style:font-weight-asian="bold" style:font-name-complex="Arial-BoldMT" style:font-size-complex="12pt" style:font-style-complex="italic" style:font-weight-complex="bold"/>
    </style:style>
    <style:style style:name="T1" style:family="text">
      <style:text-properties style:font-name-complex="ArialMT"/>
    </style:style>
    <style:style style:name="T2"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anny G. Harris <text:s text:c="102"/></text:p>
      <text:p text:style-name="P2">865-230-4662 cell</text:p>
      <text:p text:style-name="P1"><text:a xlink:type="simple" xlink:href="mailto:dan12000harris@yahoo.com"><text:span text:style-name="T2">dan12000harris@yahoo.com</text:span></text:a></text:p>
      <text:p text:style-name="P2"/>
      <text:p text:style-name="P2">Have TWIC card and OSHA 10</text:p>
      <text:p text:style-name="P2"/>
      <text:p text:style-name="P5">Objective:</text:p>
      <text:p text:style-name="P2"/>
      <text:p text:style-name="P4">Motivated hard working person,very dependable, works well with others and very safety conscious. Certified welder in all of the following categories, Smaw, Gtaw, Fcaw, and Gmaw 6G.</text:p>
      <text:p text:style-name="P6"/>
      <text:p text:style-name="P5">Qualification:</text:p>
      <text:p text:style-name="P5"/>
      <text:p text:style-name="P8">Roesline</text:p>
      <text:p text:style-name="P8">Red Bud, IL</text:p>
      <text:p text:style-name="P8">May 2014-current</text:p>
      <text:p text:style-name="P8"/>
      <text:p text:style-name="P8">Certified Pipe Welder- 6G Gtaw, SS and carbon, Smaw,Gmaw ,mig pulse and Fcaw . Structural fabricating, can read blueprints, iso, Fit and prep all my own work. Used grinders, end grinders, Band saws, plasma cutter, drill press, mag drill, and oxy torch. Can do most welding processes.Call previous employers to verify my work.</text:p>
      <text:p text:style-name="P2"/>
      <text:p text:style-name="P2">Rust Construction</text:p>
      <text:p text:style-name="P2">Duke Energy, Mcguire nuclear plant</text:p>
      <text:p text:style-name="P2">Charlotte,North Carolina</text:p>
      <text:p text:style-name="P2">Aug. 2013 to Feb.2014</text:p>
      <text:p text:style-name="P2">828-289-4469</text:p>
      <text:p text:style-name="P2"/>
      <text:p text:style-name="P2"><text:s/>Duke Energy, a Nuclear Power Plant in North Carolina. I am a <text:span text:style-name="T1">Certified welder. SMAW,GTAW,GMAW,and FCAW in all positions. All welds are x-rayed to qualifications. Can Read blueprints and ISO metric drawings, Fit most of my own work. I use grinders, end grinders, plasma cutter, Oxy torch, mag drills,pipe threader, drill press, band saws and overhead cranes. Can do most welding processes, can do basic rigging too. Please contact my previous employers to verify my work.</text:span></text:p>
      <text:p text:style-name="P2"/>
      <text:p text:style-name="P2">Enerflex LTD</text:p>
      <text:p text:style-name="P2">Casper, WY</text:p>
      <text:p text:style-name="P2">June 2011 to May 2013</text:p>
      <text:p text:style-name="P2">307-265-4450</text:p>
      <text:p text:style-name="P2"/>
      <text:p text:style-name="P4">Certified pipe code welder. SMAW,GTAW,GMAW,and FCAW in all positions. All welds are x-rayed to qualifications. Can Read blueprints and ISO metric drawings, Fit most of my own work. I use grinders, end grinders, plasma cutter, Oxy torch, mag drills,pipe threader, drill press, band saws and overhead cranes. Currently Tig welding on stainless 316 2inch sch. 40 pipe. Also Welding on carbon from 1inch to 16inch XXH pipe. Can do most welding processes. Please contact my previous employers to verify my work.</text:p>
      <text:p text:style-name="P2"/>
      <text:p text:style-name="P2"><text:soft-page-break/>Robinson Construction</text:p>
      <text:p text:style-name="P2">Perryville, Mo</text:p>
      <text:p text:style-name="P2">August 2009 to June 2011</text:p>
      <text:p text:style-name="P2">573-547-8397</text:p>
      <text:p text:style-name="P2"/>
      <text:p text:style-name="P4">Certified welder, welding SMAW, GTAW, GMAW and Orbital welding on sanitary pipe. Use of plasma cutter, oxy torch, porta band, Mag drill, Drill Press, pipe threader and Grinders. Fitting pipe, hanging hangers and hanging copper piping. General maintenance and millwright work, installing machinery, using drill press,pi[e threader, brake press and using forklift, scissor lift, jlg, and Lul. Structural welding and pipe welding from half inch stainless, to 24 inch carbon</text:p>
      <text:p text:style-name="P4">pipe. And much more.</text:p>
      <text:p text:style-name="P7">　</text:p>
      <text:p text:style-name="P2">T.E. IBBERSON</text:p>
      <text:p text:style-name="P2">Hopkins, MN</text:p>
      <text:p text:style-name="P2">Feb.2009 to August 2009</text:p>
      <text:p text:style-name="P2">952-938-7007</text:p>
      <text:p text:style-name="P2"/>
      <text:p text:style-name="P4">Certified welder, Welding and Installing pipe, Welding schedule 10 2”to 24”. Millwright work, installing Draw offs, Fluid slides, and check valves. Fitting all sizes of pipe. Using Grinders,Drill press, Mag Drill, Porta band,pipe threader, Oxy. Torch, plasma cutter, Hydraulic Press and fabricating all sizes of pipe.</text:p>
      <text:p text:style-name="P2"/>
      <text:p text:style-name="P5">Education:</text:p>
      <text:p text:style-name="P2"/>
      <text:p text:style-name="P4">Clearwater -R1</text:p>
      <text:p text:style-name="P4">Piedmont, Mo</text:p>
      <text:p text:style-name="P4">Diploma-1988</text:p>
      <text:p text:style-name="P4">Al-Med Academy</text:p>
      <text:p text:style-name="P4">Arnold, Mo</text:p>
      <text:p text:style-name="P4">Diploma- April 1994</text:p>
      <text:p text:style-name="P4">Missouri Welding Institute</text:p>
      <text:p text:style-name="P4">Nevada, Mo.</text:p>
      <text:p text:style-name="P4">Diploma- Jan. 2009</text:p>
      <text:p text:style-name="P7">　</text:p>
      <text:p text:style-name="P5">Relevant Experience:</text:p>
      <text:p text:style-name="P2"/>
      <text:p text:style-name="P4">Certified in SMAW, GMAW, FCAW, GTAW, AND Pipe Fitting: Cut out steel,drill press,break press, use grinders,end grinders,band saw,oxy torches,plasma cutter,pipe threader,isometric drawings,Blueprints, overhead cranes, JLGs and many welding proce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BoldMT" svg:font-family="Arial-BoldMT"/>
    <style:font-face style:name="Mangal1" svg:font-family="Mangal"/>
    <style:font-face style:name="TimesNewRomanPS-BoldMT" svg:font-family="TimesNewRomanPS-BoldMT"/>
    <style:font-face style:name="ArialMT" svg:font-family="ArialMT" style:font-family-generic="swiss"/>
    <style:font-face style:name="ArialUnicodeMS" svg:font-family="ArialUnicodeM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ny Harris</meta:initial-creator>
    <meta:creation-date>2013-11-06T07:34:10.05</meta:creation-date>
    <dc:date>2014-11-29T12:13:26.72</dc:date>
    <dc:creator>danny harris</dc:creator>
    <meta:editing-duration>PT2H58M29S</meta:editing-duration>
    <meta:editing-cycles>16</meta:editing-cycles>
    <meta:generator>OpenOffice/4.0.0$Win32 OpenOffice.org_project/400m3$Build-9702</meta:generator>
    <meta:printed-by>danny harris</meta:printed-by>
    <meta:print-date>2014-10-14T18:49:01.20</meta:print-date>
    <meta:document-statistic meta:table-count="0" meta:image-count="0" meta:object-count="0" meta:page-count="2" meta:paragraph-count="47" meta:word-count="472" meta:character-count="3243"/>
  </office:meta>
</office:document-meta>
</file>