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Header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Header" style:family="paragraph">
      <style:paragraph-properties fo:text-align="center"/>
      <style:text-properties fo:font-weight="bold" style:font-weight-asian="bold"/>
    </style:style>
    <style:style style:name="P3" style:parent-style-name="Header" style:family="paragraph">
      <style:paragraph-properties fo:text-align="center"/>
      <style:text-properties fo:font-weight="bold" style:font-weight-asian="bold"/>
    </style:style>
    <style:style style:name="P4" style:parent-style-name="Header" style:family="paragraph">
      <style:text-properties fo:font-weight="bold" style:font-weight-asian="bold"/>
    </style:style>
    <style:style style:name="P5" style:parent-style-name="Standard" style:family="paragraph">
      <style:paragraph-properties fo:border="0in none #000000" fo:padding="0.0277in" style:shadow="none" fo:text-align="center" fo:margin-left="-0.6562in" fo:margin-right="-0.2708in">
        <style:tab-stops/>
      </style:paragraph-properties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MERON V. COFFMAN</text:p>
      <text:p text:style-name="P2">7313 Northline Drive <text:s text:c="2"/>Apt. 703</text:p>
      <text:p text:style-name="P3">Houston, <text:s/>Texas <text:s text:c="2"/>77076</text:p>
      <text:p text:style-name="P4">(832) 767-7224 (Cell)<text:tab/><text:s text:c="80"/>cameroncoffman@ymail.com</text:p>
      <text:p text:style-name="P5"/>
      <text:p text:style-name="P6"/>
      <text:p text:style-name="P7">Twenty years of solid experience in the warehouse and distribution industry that encompasses the <text:s/></text:p>
      <text:p text:style-name="P8">broad areas of Inventory Control, Forklift Operator, and Shipping/Receiving .</text:p>
      <text:p text:style-name="P9"/>
      <text:p text:style-name="P10">Areas of Expertise</text:p>
      <text:list text:style-name="LFO1" text:continue-numbering="true">
        <text:list-item>
          <text:p text:style-name="P11"><text:span text:style-name="T12">Reliable and safety conscious wi</text:span><text:span text:style-name="T13">th good solid experience in warehouse operations to include: forklift operation, shipping and receiving, pick/packaging, staging and stocking inventory ,loading and <text:s/>unloading trucks, in a timely manner.</text:span></text:p>
        </text:list-item>
        <text:list-item>
          <text:p text:style-name="P14">Excel at accurately labeling freight, UPS/Fedex <text:s/>shipping, cycle-counting, data-entry, and can maintain effective records on Warehouse Management System.</text:p>
        </text:list-item>
        <text:list-item>
          <text:p text:style-name="P15">Proficient in the use and operation of forklifts (sitdown and standup), high-lift order pickers, and pallet movers safely.</text:p>
        </text:list-item>
        <text:list-item>
          <text:p text:style-name="P16"><text:span text:style-name="T17">Readily supports all new proces</text:span><text:span text:style-name="T18">ses and promotes a team-oriented environment, to build positive morale and control costs for company.</text:span></text:p>
        </text:list-item>
      </text:list>
      <text:p text:style-name="P19"/>
      <text:p text:style-name="P20">Accomplishments</text:p>
      <text:list text:style-name="LFO2" text:continue-numbering="true">
        <text:list-item>
          <text:p text:style-name="P21">Saved Woot Inc. inventory costs by effectively finding discrepancies in supplied stock.</text:p>
        </text:list-item>
        <text:list-item>
          <text:p text:style-name="P22">Implemented new ideas to raise productivity<text:s/>levels on receiving time at both Woot Inc. and Thermadyne.</text:p>
        </text:list-item>
        <text:list-item>
          <text:p text:style-name="P23">Effectively communicated with customers and management to ensure accuracy, quality, and safety.</text:p>
        </text:list-item>
      </text:list>
      <text:p text:style-name="P24">Successfully managed transitional housing for parolees as Assistant Manager of Operations at The Hand<text:s/>Up Inc.</text:p>
      <text:p text:style-name="P25"/>
      <text:p text:style-name="P26">Work History</text:p>
      <text:p text:style-name="P27">Media Nation <text:s text:c="21"/>Sign Spinner <text:s text:c="39"/>May 2014- Present <text:s text:c="6"/></text:p>
      <text:p text:style-name="P28"/>
      <text:p text:style-name="P29">Chemical Systems <text:s text:c="14"/>General Labor <text:s text:c="23"/><text:s text:c="11"/>January 2014- May 2014</text:p>
      <text:p text:style-name="P30"/>
      <text:p text:style-name="P31">CaseSearch<text:tab/><text:tab/><text:tab/>Paralegal Intern<text:tab/><text:tab/><text:tab/>December 2013- March 2014</text:p>
      <text:p text:style-name="P32"/>
      <text:p text:style-name="P33">The Hand Up Inc. <text:s text:c="10"/>Asst. Manager<text:tab/><text:tab/><text:tab/><text:s text:c="11"/>July 2013- January 2014</text:p>
      <text:p text:style-name="P34"/>
      <text:p text:style-name="P35">Woot Inc.<text:tab/><text:tab/><text:s text:c="3"/>Inventory Control<text:tab/><text:tab/><text:tab/><text:s text:c="11"/>February 2008- April 2008</text:p>
      <text:p text:style-name="P36"/>
      <text:p text:style-name="P37">Thermadyne Corp. <text:s text:c="2"/>Warehouse Associate/Forklift Operator <text:s text:c="3"/>May 2005- February 2008</text:p>
      <text:p text:style-name="P38"/>
      <text:p text:style-name="P39">Video Plus Inc.<text:tab/>Warehouse Associate/Forklift Operator <text:s text:c="3"/>January 2005- May 2005</text:p>
      <text:p text:style-name="P40"/>
      <text:p text:style-name="P41">Education</text:p>
      <text:p text:style-name="P42">Associates Degree in Business Administration</text:p>
      <text:p text:style-name="P43">Southern Ohio College, Cincinnati, Ohio <text:s text:c="4"/>1991</text:p>
      <text:soft-page-break/>
      <text:p text:style-name="P44">Certifications</text:p>
      <text:p text:style-name="P45">OSHA 29CFR Forklift Certified <text:s text:c="3"/>August 2012 – August 2015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wlibrary10</meta:initial-creator>
    <dc:creator>Resource Room</dc:creator>
    <meta:creation-date>2014-06-20T15:52:00Z</meta:creation-date>
    <dc:date>2014-06-20T15:52:00Z</dc:date>
    <meta:print-date>2014-03-21T16:21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5" meta:character-count="2247" meta:row-count="15" meta:non-whitespace-character-count="1916"/>
  </office:meta>
</office:document-meta>
</file>