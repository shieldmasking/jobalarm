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ooper Black" svg:font-family="'Cooper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No_20_Spacing">
      <style:paragraph-properties fo:text-align="center" style:justify-single-word="false"/>
    </style:style>
    <style:style style:name="P2" style:family="paragraph" style:parent-style-name="No_20_Spacing">
      <style:text-properties style:font-name="Cooper Black" fo:font-size="16pt" style:font-size-asian="16pt" style:font-size-complex="16pt"/>
    </style:style>
    <style:style style:name="P3" style:family="paragraph" style:parent-style-name="No_20_Spacing" style:master-page-name="Standard">
      <style:paragraph-properties fo:text-align="center" style:justify-single-word="false" style:page-number="auto"/>
      <style:text-properties style:font-name="Cooper Black" fo:font-size="24pt" style:font-size-asian="24pt" style:font-size-complex="24pt"/>
    </style:style>
    <style:style style:name="P4" style:family="paragraph" style:parent-style-name="No_20_Spacing" style:list-style-name="WWNum1"/>
    <style:style style:name="P5" style:family="paragraph" style:parent-style-name="No_20_Spacing" style:list-style-name="WWNum1">
      <style:text-properties style:font-name="Cooper Black" fo:font-size="16pt" style:font-size-asian="16pt" style:font-size-complex="16pt"/>
    </style:style>
    <style:style style:name="P6" style:family="paragraph" style:parent-style-name="No_20_Spacing" style:list-style-name="WWNum2"/>
    <style:style style:name="P7" style:family="paragraph" style:parent-style-name="No_20_Spacing" style:list-style-name="WWNum1">
      <style:text-properties fo:font-style="italic" fo:font-weight="bold" style:font-style-asian="italic" style:font-weight-asian="bold"/>
    </style:style>
    <style:style style:name="T1" style:family="text">
      <style:text-properties fo:font-style="italic" fo:font-weight="bold" style:font-style-asian="italic" style:font-weight-asian="bold"/>
    </style:style>
    <style:style style:name="T2" style:family="text">
      <style:text-properties fo:font-style="italic" style:font-style-asian="italic"/>
    </style:style>
    <style:style style:name="Sect1"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ICHARD “BEN” PAREDEZ</text:p>
      <text:p text:style-name="P1">4409 Mimosa Court, Fort Worth, TX <text:s/>76137</text:p>
      <text:p text:style-name="P1">(817) 907-2096</text:p>
      <text:p text:style-name="P1"><text:a xlink:type="simple" xlink:href="mailto:benparedez@yahoo.com">benparedez@yahoo.com</text:a></text:p>
      <text:p text:style-name="P2">PROFILE</text:p>
      <text:p text:style-name="No_20_Spacing">Leader and manager with over ten years experience with skills in merchandising, customer service, sales and shipping and receiving. Promoted on various jobs from stocking to supervisory role within retail and Warehouse industry.</text:p>
      <text:p text:style-name="No_20_Spacing"/>
      <text:p text:style-name="P2">SKILLS</text:p>
      <text:section text:style-name="Sect1" text:name="TextSection">
        <text:list xml:id="list36674531" text:style-name="WWNum1">
          <text:list-item>
            <text:p text:style-name="P4">Training and Development</text:p>
          </text:list-item>
          <text:list-item>
            <text:p text:style-name="P4">Customer Service</text:p>
          </text:list-item>
          <text:list-item>
            <text:p text:style-name="P4">Customer Resolution</text:p>
          </text:list-item>
          <text:list-item>
            <text:p text:style-name="P4">Conflict Resolution</text:p>
          </text:list-item>
          <text:list-item>
            <text:p text:style-name="P4">Scheduling of Staff</text:p>
          </text:list-item>
          <text:list-item>
            <text:p text:style-name="P4">Safety Procedures</text:p>
          </text:list-item>
          <text:list-item>
            <text:p text:style-name="P4">Merchandising</text:p>
          </text:list-item>
          <text:list-item>
            <text:p text:style-name="P4">Quality Control</text:p>
          </text:list-item>
          <text:list-item>
            <text:p text:style-name="P4">Shipping and Receiving</text:p>
          </text:list-item>
          <text:list-item>
            <text:p text:style-name="P4">Retail Management</text:p>
          </text:list-item>
          <text:list-item>
            <text:p text:style-name="P4">Retail Distribution</text:p>
          </text:list-item>
          <text:list-item>
            <text:p text:style-name="P4">Warehousing</text:p>
          </text:list-item>
          <text:list-item>
            <text:p text:style-name="P4">Sales and Marketing</text:p>
          </text:list-item>
          <text:list-item>
            <text:p text:style-name="P4">Safety and Compliance</text:p>
          </text:list-item>
          <text:list-item>
            <text:p text:style-name="P4">Performance Standards</text:p>
          </text:list-item>
          <text:list-item>
            <text:p text:style-name="P4">Team Leadership</text:p>
          </text:list-item>
          <text:list-item>
            <text:p text:style-name="P4">Inventory Control </text:p>
          </text:list-item>
        </text:list>
      </text:section>
      <text:section text:style-name="Sect2" text:name="Section1">
        <text:list xml:id="list36695969" text:continue-numbering="true" text:style-name="WWNum1">
          <text:list-header>
            <text:p text:style-name="P4"/>
            <text:p text:style-name="P5">ACCOMPLISHMENTS</text:p>
          </text:list-header>
        </text:list>
        <text:list xml:id="list36652344" text:style-name="WWNum2">
          <text:list-item>
            <text:p text:style-name="P6">In charge of merchandising various products for mass profitability and nation-wide distribution.</text:p>
          </text:list-item>
          <text:list-item>
            <text:p text:style-name="P6">Managed an entire department, trained employees on products and customer service skills.</text:p>
          </text:list-item>
          <text:list-item>
            <text:p text:style-name="P6">Oversaw approximately forty (40) employees in various departments supervised production and quality control.</text:p>
          </text:list-item>
          <text:list-item>
            <text:p text:style-name="P6">Set shipping goals for inbound and outbound distribution. </text:p>
          </text:list-item>
          <text:list-item>
            <text:p text:style-name="P6">Promoted in nation-wide retail company up to five times to increase and expand skills and abilities.</text:p>
          </text:list-item>
        </text:list>
        <text:list xml:id="list36679427" text:continue-list="list36695969" text:style-name="WWNum1">
          <text:list-header>
            <text:p text:style-name="P4"/>
            <text:p text:style-name="P5"/>
            <text:p text:style-name="P5">PROFESSIONAL WORK HISTORY</text:p>
          </text:list-header>
          <text:list-item>
            <text:p text:style-name="P7">Selector/Loader <text:s text:c="33"/>MBM food service company(Staffmark) <text:s text:c="5"/>Fort</text:p>
            <text:p text:style-name="P7">Worth,TX</text:p>
            <text:p text:style-name="P7">03/2013-Present</text:p>
          </text:list-item>
          <text:list-item>
            <text:p text:style-name="P7">Forklift Operator <text:s text:c="30"/>Winsdor Foods(select staffing) <text:s text:c="21"/>Fort </text:p>
            <text:p text:style-name="P7">Worth,TX</text:p>
            <text:p text:style-name="P7">11/2012-02/2013</text:p>
          </text:list-item>
          <text:list-item>
            <text:p text:style-name="P4"><text:span text:style-name="T1">Merchandise/Counselor</text:span> <text:tab/><text:tab/>Scott Miracle-Gro Company<text:tab/><text:tab/><text:tab/>Fort Worth, TX</text:p>
            <text:p text:style-name="P4">02/2012-06/2012,Seasonal job</text:p>
          </text:list-item>
          <text:list-item>
            <text:p text:style-name="P4"><text:soft-page-break/><text:span text:style-name="T1">Department Manager</text:span><text:span text:style-name="T2"><text:tab/></text:span><text:tab/><text:tab/>The Home Depot<text:tab/><text:tab/><text:tab/><text:tab/>Fort Worth, TX</text:p>
            <text:p text:style-name="P4">10/2010-01/2012</text:p>
          </text:list-item>
          <text:list-item>
            <text:p text:style-name="P4"><text:span text:style-name="T1">Merchandiser/Counselor</text:span><text:tab/><text:tab/>Scotts Miracle-Gro Company<text:tab/><text:tab/><text:tab/>Fort Worth, TX</text:p>
            <text:p text:style-name="P4">01/2010-10/2010,Seasonal job</text:p>
          </text:list-item>
          <text:list-item>
            <text:p text:style-name="P4"><text:span text:style-name="T1">Shift Supervisor</text:span><text:tab/><text:tab/><text:tab/><text:tab/>Greatwide Logistics<text:tab/><text:tab/><text:tab/><text:tab/>Fort Worth, TX</text:p>
            <text:p text:style-name="P4">04/2007-08/2009</text:p>
          </text:list-item>
          <text:list-item>
            <text:p text:style-name="P4"><text:span text:style-name="T1">Department Supervisor</text:span><text:tab/><text:tab/><text:tab/>The Home Depot<text:tab/><text:tab/><text:tab/><text:tab/>NRH, TX</text:p>
            <text:p text:style-name="P4">08/2003-04/2007</text:p>
          </text:list-item>
          <text:list-item>
            <text:p text:style-name="P4"><text:span text:style-name="T1">Driver/Customer Service Rep<text:tab/><text:tab/></text:span>Nations Rent<text:tab/><text:tab/><text:tab/><text:tab/><text:tab/>Fort Worth, TX</text:p>
            <text:p text:style-name="P4">07/2002-08/2003</text:p>
          </text:list-item>
          <text:list-item>
            <text:p text:style-name="P4"><text:span text:style-name="T1">Machine Operator</text:span><text:tab/><text:tab/><text:tab/>Kimberly Clark<text:tab/><text:tab/><text:tab/><text:tab/><text:tab/>NRH, TX</text:p>
            <text:p text:style-name="P4">05/2000-07/2002</text:p>
          </text:list-item>
          <text:list-item>
            <text:p text:style-name="P4"><text:span text:style-name="T1">Team Sports Department Supervisor</text:span><text:tab/>Academy Sports &amp; Outdoors<text:tab/><text:tab/><text:tab/>NRH, TX </text:p>
            <text:p text:style-name="P4">06/1996-04/2000<text:tab/></text:p>
            <text:p text:style-name="P4"/>
            <text:p text:style-name="P4"/>
            <text:p text:style-name="P4"/>
            <text:p text:style-name="P4"/>
            <text:p text:style-name="P4"/>
            <text:p text:style-name="P4"/>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ooper Black" svg:font-family="'Cooper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_20_Spacing" style:display-name="No Spacing" style:family="paragraph" style:default-outline-level="">
      <style:paragraph-properties fo:margin-top="0in" fo:margin-bottom="0in" fo:line-height="100%" fo:orphans="2" fo:widows="2" style:writing-mode="lr-tb"/>
      <style:text-properties style:use-window-font-color="tru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ste.andersclemons</meta:initial-creator>
    <meta:editing-cycles>6</meta:editing-cycles>
    <meta:print-date>2012-11-29T21:38:00</meta:print-date>
    <meta:creation-date>2012-11-27T21:39:00</meta:creation-date>
    <dc:date>2013-08-05T16:54:18.71</dc:date>
    <meta:editing-duration>PT13M43S</meta:editing-duration>
    <meta:generator>OpenOffice.org/3.3$Win32 OpenOffice.org_project/330m20$Build-9567</meta:generator>
    <meta:document-statistic meta:table-count="0" meta:image-count="0" meta:object-count="0" meta:page-count="2" meta:paragraph-count="53" meta:word-count="283" meta:character-count="203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