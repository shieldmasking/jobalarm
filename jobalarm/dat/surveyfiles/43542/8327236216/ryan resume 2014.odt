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Standard">
      <style:paragraph-properties fo:text-align="center" style:justify-single-word="false"/>
      <style:text-properties fo:font-size="9pt" style:text-underline-style="none" fo:font-weight="normal" style:font-size-asian="9pt" style:font-weight-asian="normal" style:font-size-complex="9pt" style:font-weight-complex="normal"/>
    </style:style>
    <style:style style:name="P2" style:family="paragraph" style:parent-style-name="Standard">
      <style:paragraph-properties fo:text-align="center" style:justify-single-word="false"/>
      <style:text-properties style:font-name="Verdana1"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style:font-name="Verdana" fo:font-size="9pt" style:text-underline-style="none" fo:font-weight="normal" style:font-name-asian="Verdana" style:font-size-asian="9pt" style:font-weight-asian="normal" style:font-name-complex="Verdana" style:font-size-complex="9pt" style:font-weight-complex="normal"/>
    </style:style>
    <style:style style:name="P4" style:family="paragraph" style:parent-style-name="Standard">
      <style:paragraph-properties fo:text-align="center" style:justify-single-word="false"/>
      <style:text-properties style:font-name="Verdana" fo:font-size="11pt" style:text-underline-style="none" fo:font-weight="bold" style:font-name-asian="Verdana" style:font-size-asian="11pt" style:font-weight-asian="bold" style:font-name-complex="Verdana" style:font-size-complex="11pt" style:font-weight-complex="bold"/>
    </style:style>
    <style:style style:name="P5" style:family="paragraph" style:parent-style-name="Standard">
      <style:paragraph-properties fo:text-align="start" style:justify-single-word="false"/>
      <style:text-properties style:font-name="Verdana" fo:font-size="11pt" style:text-underline-style="none" fo:font-weight="bold" style:font-name-asian="Verdana" style:font-size-asian="11pt" style:font-weight-asian="bold" style:font-name-complex="Verdana" style:font-size-complex="11pt" style:font-weight-complex="bold"/>
    </style:style>
    <style:style style:name="P6" style:family="paragraph" style:parent-style-name="Standard">
      <style:paragraph-properties fo:text-align="start" style:justify-single-word="false"/>
      <style:text-properties style:font-name="Verdana" fo:font-size="11pt" style:text-underline-style="none" fo:font-weight="normal" style:font-name-asian="Verdana" style:font-size-asian="11pt" style:font-weight-asian="normal" style:font-name-complex="Verdana" style:font-size-complex="11pt" style:font-weight-complex="normal"/>
    </style:style>
    <style:style style:name="P7" style:family="paragraph" style:parent-style-name="Standard">
      <style:paragraph-properties fo:text-align="center" style:justify-single-word="false"/>
      <style:text-properties style:font-name="Verdana" style:font-name-asian="Verdana" style:font-name-complex="Verdana"/>
    </style:style>
    <style:style style:name="P8" style:family="paragraph" style:parent-style-name="Horizontal_20_Line">
      <style:text-properties style:font-name="Verdana" style:font-name-asian="Verdana" style:font-name-complex="Verdana"/>
    </style:style>
    <style:style style:name="P9" style:family="paragraph" style:parent-style-name="Horizontal_20_Line">
      <style:text-properties style:font-name="Verdana" fo:font-size="11pt" style:text-underline-style="none" fo:font-weight="normal" style:font-name-asian="Verdana" style:font-size-asian="11pt" style:font-weight-asian="normal" style:font-name-complex="Verdana" style:font-size-complex="11pt" style:font-weight-complex="normal"/>
    </style:style>
    <style:style style:name="P10" style:family="paragraph" style:parent-style-name="Table_20_Contents">
      <style:paragraph-properties fo:text-align="center" style:justify-single-word="false"/>
      <style:text-properties style:font-name="Verdana" fo:font-size="11pt" style:font-name-asian="Verdana" style:font-size-asian="11pt" style:font-name-complex="Verdana" style:font-size-complex="11pt"/>
    </style:style>
    <style:style style:name="P11" style:family="paragraph" style:parent-style-name="Standard" style:list-style-name="L1">
      <style:paragraph-properties fo:text-align="center" style:justify-single-word="false"/>
      <style:text-properties style:font-name="Verdana" fo:font-size="11pt" style:text-underline-style="none" fo:font-weight="normal" style:font-name-asian="Verdana" style:font-size-asian="11pt" style:font-weight-asian="normal" style:font-name-complex="Verdana" style:font-size-complex="11pt" style:font-weight-complex="normal"/>
    </style:style>
    <style:style style:name="P12" style:family="paragraph" style:parent-style-name="Standard" style:list-style-name="L1">
      <style:paragraph-properties fo:text-align="start" style:justify-single-word="false"/>
      <style:text-properties style:font-name="Verdana" fo:font-size="11pt" style:text-underline-style="none" fo:font-weight="bold" style:font-name-asian="Verdana" style:font-size-asian="11pt" style:font-weight-asian="bold" style:font-name-complex="Verdana" style:font-size-complex="11pt" style:font-weight-complex="bold"/>
    </style:style>
    <style:style style:name="T1" style:family="text">
      <style:text-properties style:font-name="Verdana1"/>
    </style:style>
    <style:style style:name="T2" style:family="text">
      <style:text-properties style:font-name="Verdana1" style:font-name-asian="SimSun" style:font-name-complex="Mangal"/>
    </style:style>
    <style:style style:name="T3" style:family="text">
      <style:text-properties style:font-name="Verdana" style:font-name-asian="Verdana" style:font-name-complex="Verdana"/>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s text:c="10"/>RYAN PHILLIPS <text:s text:c="9"/></text:p>
      <text:p text:style-name="P1"><text:span text:style-name="T1">2810 Grants Lake Blvd unit 1305 </text:span><text:span text:style-name="T3">•</text:span><text:span text:style-name="T2"> Sugar Land, TX </text:span><text:span text:style-name="T3">• 77479 • 832-723-6216 • </text:span><text:a xlink:type="simple" xlink:href="mailto:ryantexas11@yahoo.com"><text:span text:style-name="T3">ryantexas11@yahoo.com</text:span></text:a></text:p>
      <text:p text:style-name="P3"/>
      <text:p text:style-name="P8"/>
      <text:p text:style-name="P4">CAREER PROFILE</text:p>
      <text:p text:style-name="P6">Well qualified professional in the oil, gas and fabrication industries with 20 years of experience, 10 years of that offshore in sub sea construction. Possesses strong supervisory skills and experience in planning, communication and executing all assigned tasks in a safe and efficient manner</text:p>
      <text:p text:style-name="P6"/>
      <text:p text:style-name="P8"/>
      <text:p text:style-name="P4">RECENT EXPERIENCE</text:p>
      <text:p text:style-name="P6">Worked as an offshore roustabout, deck foreman, supervisor and diver on offshore installations both in the Gulf of Mexico and internationally. Assisted decommissioning, well control and inspection teams offshore and on land in Mexico and Africa supporting the oil and gas industry</text:p>
      <text:p text:style-name="P9"/>
      <text:p text:style-name="P4">PRIOR EXPERIENCE</text:p>
      <text:p text:style-name="P6">Effectively assisted personnel in daily operations that included welding, fabrication, inspection and proper use of all tools and cutting devices. Supervised set up and staging of tools, trouble shooting and proper repair of all tools on board vessel, rig or platform. Tools include inspection equipment, welders, diamond wire saws, hydraulics and pumps. All rigging functions performed efficiently in a professional environment</text:p>
      <text:p text:style-name="P6"/>
      <text:p text:style-name="Horizontal_20_Line"/>
      <text:p text:style-name="P4">QUALIFICATIONS AND CERTIFICATIONS</text:p>
      <text:p text:style-name="P4"/>
      <table:table table:name="Table1" table:style-name="Table1">
        <table:table-column table:style-name="Table1.A"/>
        <table:table-column table:style-name="Table1.B"/>
        <table:table-row>
          <table:table-cell table:style-name="Table1.A1" office:value-type="string">
            <text:p text:style-name="P10">Rigging (API RP2D)</text:p>
            <text:p text:style-name="P10">Chevron Riggers Safety Endorsement</text:p>
            <text:p text:style-name="P10">TWIC card</text:p>
            <text:p text:style-name="P10">Commercial Diver</text:p>
            <text:p text:style-name="P10">Class A CDL permit</text:p>
            <text:p text:style-name="P10">Structural Welding</text:p>
            <text:p text:style-name="P10">Mig Welding</text:p>
          </table:table-cell>
          <table:table-cell table:style-name="Table1.B1" office:value-type="string">
            <text:p text:style-name="P10">OSHA Forklift</text:p>
            <text:p text:style-name="P10">HAZWOPER</text:p>
            <text:p text:style-name="P10">HUETT/OPITA</text:p>
            <text:p text:style-name="P10">SAFEGULF</text:p>
            <text:p text:style-name="P10">Ultrasonic I &amp; II</text:p>
            <text:p text:style-name="P10">Magnetic Particle I &amp; II</text:p>
            <text:p text:style-name="P10">Dye penetrant</text:p>
          </table:table-cell>
        </table:table-row>
      </table:table>
      <text:p text:style-name="P7"/>
      <text:p text:style-name="P5">EMPLOYMENT:<text:tab/><text:tab/><text:tab/><text:tab/><text:tab/><text:tab/>TRAINING:</text:p>
      <text:p text:style-name="P5">PetroHab 2012- current<text:tab/><text:tab/><text:tab/><text:tab/>Industrial Welding Academy<text:span text:style-name="T4"> 2012</text:span></text:p>
      <text:p text:style-name="P5"><text:span text:style-name="T4">Hot Work Safety Supervisor<text:tab/><text:tab/><text:tab/><text:tab/></text:span>KBR Singapore <text:span text:style-name="T4">2010</text:span></text:p>
      <text:p text:style-name="P5">Local 2235 2011-2012<text:tab/><text:tab/><text:tab/><text:tab/><text:tab/>Ocean Corporation <text:span text:style-name="T4">2007</text:span></text:p>
      <text:p text:style-name="P6">Diver, Rigger, Pile Driver, Pump Operator<text:tab/><text:tab/></text:p>
      <text:p text:style-name="P5">Legacy Offshore 2008-2011</text:p>
      <text:p text:style-name="P6">Offshore Oilfield Diver, ALST, Inspector, Foreman</text:p>
      <text:list xml:id="list5093499003553277864" text:style-name="L1">
        <text:list-header>
          <text:p text:style-name="P11"/>
          <text:p text:style-name="P1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2T11:24:34.61</meta:creation-date>
    <dc:date>2014-06-16T08:16:24.55</dc:date>
    <meta:editing-duration>P1DT4H13M43S</meta:editing-duration>
    <meta:editing-cycles>9</meta:editing-cycles>
    <meta:generator>OpenOffice/4.0.1$Win32 OpenOffice.org_project/401m5$Build-9714</meta:generator>
    <meta:print-date>2014-05-18T11:06:56.10</meta:print-date>
    <meta:document-statistic meta:table-count="1" meta:image-count="0" meta:object-count="0" meta:page-count="1" meta:paragraph-count="30" meta:word-count="246" meta:character-count="1721"/>
  </office:meta>
</office:document-meta>
</file>