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2" style:family="paragraph" style:parent-style-name="Standard">
      <style:paragraph-properties style:line-height-at-least="0.0693in" fo:text-align="start" style:justify-single-word="false" style:writing-mode="lr-tb"/>
      <style:text-properties style:font-name-asian="Times New Roman1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-asian="Times New Roman1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>
      <style:paragraph-properties fo:text-align="start" style:justify-single-word="false" style:writing-mode="lr-tb">
        <style:tab-stops>
          <style:tab-stop style:position="0.8543in"/>
        </style:tab-stops>
      </style:paragraph-properties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/>
    </style:style>
    <style:style style:name="P7" style:family="paragraph" style:parent-style-name="Standard">
      <style:paragraph-properties style:line-height-at-least="0.0693in" fo:text-align="start" style:justify-single-word="false" style:writing-mode="lr-tb"/>
    </style:style>
    <style:style style:name="P8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 style:master-page-name="Standard">
      <style:paragraph-properties style:line-height-at-least="0.0693in" fo:text-align="start" style:justify-single-word="false" style:page-number="auto" fo:padding-left="0in" fo:padding-right="0in" fo:padding-top="0in" fo:padding-bottom="0.0138in" fo:border-left="none" fo:border-right="none" fo:border-top="none" fo:border-bottom="0.0138in solid #ffffff" style:writing-mode="lr-tb"/>
      <style:text-properties fo:font-size="12pt" fo:font-style="normal" fo:font-weight="bold" style:font-name-asian="Times New Roman1" style:font-size-asian="12pt" style:font-style-asian="normal" style:font-weight-asian="bold" style:font-size-complex="12pt" style:font-weight-complex="bold"/>
    </style:style>
    <style:style style:name="P12" style:family="paragraph" style:parent-style-name="Standard" style:list-style-name="WW8Num1">
      <style:paragraph-properties fo:text-align="justify" style:justify-single-word="false" style:writing-mode="lr-tb"/>
      <style:text-properties style:font-name-asian="Times New Roman1"/>
    </style:style>
    <style:style style:name="P13" style:family="paragraph" style:parent-style-name="Standard" style:list-style-name="WW8Num1">
      <style:paragraph-properties fo:text-align="start" style:justify-single-word="false" style:writing-mode="lr-tb"/>
      <style:text-properties style:font-name-asian="Times New Roman1"/>
    </style:style>
    <style:style style:name="P14" style:family="paragraph" style:parent-style-name="Standard" style:list-style-name="WW8Num1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15" style:family="paragraph" style:parent-style-name="Standard" style:list-style-name="WW8Num1">
      <style:paragraph-properties fo:text-align="start" style:justify-single-word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Times New Roman1" style:font-weight-asian="normal" style:font-weight-complex="normal"/>
    </style:style>
    <style:style style:name="T4" style:family="text">
      <style:text-properties fo:font-size="12pt" fo:language="zxx" fo:country="none" style:font-size-asian="12pt" style:font-size-complex="12pt"/>
    </style:style>
    <style:style style:name="T5" style:family="text">
      <style:text-properties fo:font-size="10pt" fo:language="en" fo:country="US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onald Tucker</text:p>
      <text:p text:style-name="P2">3210 Glen Hill</text:p>
      <text:p text:style-name="P4">Rowlett, Texas 75088</text:p>
      <text:p text:style-name="P4">Home Phone 972 412 8458</text:p>
      <text:p text:style-name="P6">forklifttech@verizon.net</text:p>
      <text:p text:style-name="P4"/>
      <text:p text:style-name="P7"><text:span text:style-name="T1">OBJECTIVE</text:span><text:span text:style-name="T2">: Maintenance Mechanic or Technician position maintaining CNC, electronic, electrical, hydraulic/pneumatic, electro- </text:span></text:p>
      <text:p text:style-name="P4"><text:span text:style-name="T4"><text:s text:c="21"/></text:span><text:span text:style-name="T5">mechanical, and mechanical equipment. This also includes material handling equipment (forklifts, etc.).</text:span></text:p>
      <text:p text:style-name="P4"/>
      <text:p text:style-name="P8">QUALIFICATIONS</text:p>
      <text:p text:style-name="P4"/>
      <text:list xml:id="list1251033377674310173" text:style-name="WW8Num1">
        <text:list-item>
          <text:p text:style-name="P12">Proficient in ballscrew replacement, <text:s/>grid shift/axes alignment and turret alignments. Brands worked on include Mazak, DMG/Deckel Maho, Hurco, Haas, Sharp, Bridgeport, Di-Arco, Tennsmith, Mori Seiki, Churchill, Dufour, Salvagnini, Franklin, Trumpf, Cincinnati, Amada, Index. Various FANUC Control systems, and other obscure or out of business <text:s/>brands/manufacturers.</text:p>
        </text:list-item>
      </text:list>
      <text:p text:style-name="P4"/>
      <text:list xml:id="list38707026" text:continue-numbering="true" text:style-name="WW8Num1">
        <text:list-item>
          <text:p text:style-name="P14">Trained as a technician and educated at a College Level (Associates or Bachelor Degree) in Electronics. Skilled in logical troubleshooting and making repairs at or above OEM standards.</text:p>
        </text:list-item>
      </text:list>
      <text:p text:style-name="P4"/>
      <text:list xml:id="list38728805" text:continue-numbering="true" text:style-name="WW8Num1">
        <text:list-item>
          <text:p text:style-name="P14">Instructed fellow technicians / mechanics in class room and on the job training for various employers.</text:p>
        </text:list-item>
      </text:list>
      <text:p text:style-name="P4"/>
      <text:list xml:id="list38709159" text:continue-numbering="true" text:style-name="WW8Num1">
        <text:list-item>
          <text:p text:style-name="P15"><text:span text:style-name="T2"><text:s/></text:span><text:span text:style-name="T3">Experienced in troubleshooting and repairing hydraulic, pneumatic, electric, and electronic systems. Capable of maintaining a variety of industrial equipment (working with various system voltages, pressures, and controls). Can troubleshoot to module or component level on equipment faults. Solves problems that baffle other technicians/mechanics.</text:span></text:p>
        </text:list-item>
      </text:list>
      <text:p text:style-name="P4"/>
      <text:list xml:id="list38720542" text:continue-numbering="true" text:style-name="WW8Num1">
        <text:list-item>
          <text:p text:style-name="P14">Eight years maintaining and troubleshooting PLCs and PLC controlled equipment (Allen Bradley, Siemens, Mitsubishi, Beckhoff, and other A&amp;B “Clone” PLCs). Eighteen including the CPU based forklift control systems.</text:p>
        </text:list-item>
      </text:list>
      <text:p text:style-name="P4"/>
      <text:list xml:id="list38707955" text:continue-numbering="true" text:style-name="WW8Num1">
        <text:list-item>
          <text:p text:style-name="P13">Over ten years experience working on forklifts (mainly electric powered and electromechanical designs) and electric vehicles. <text:s text:c="2"/></text:p>
        </text:list-item>
      </text:list>
      <text:p text:style-name="P3"/>
      <text:list xml:id="list38733049" text:continue-numbering="true" text:style-name="WW8Num1">
        <text:list-item>
          <text:p text:style-name="P15">Eleven years in the U.S. Navy as an electronics technician, nuclear propulsion plant operation and maintenance. Various other duties: copier technician, surface mount solder,hydraulic repairs, material handling, and lifting equipment .</text:p>
        </text:list-item>
      </text:list>
      <text:p text:style-name="P4"/>
      <text:p text:style-name="P8">EDUCATION</text:p>
      <text:p text:style-name="P4"><text:s/></text:p>
      <text:p text:style-name="P3">1994-2009 <text:s text:c="4"/>Various classes at Rubbermaid, Malin Integrated Handling Solutions, <text:s/>Siemens, <text:s/>and Lockheed Martin Aero.</text:p>
      <text:p text:style-name="P4"/>
      <text:p text:style-name="P3">1982-1993 <text:s text:c="4"/>Training in the U.S. Navy, most notably: Electronics Technician ‘A’ School, Naval Nuclear Power Prototype, Miniature and Micro miniature Solder Repair, copier repair. </text:p>
      <text:p text:style-name="P4"/>
      <text:p text:style-name="P8">EMPLOYMENT </text:p>
      <text:p text:style-name="P8"/>
      <text:p text:style-name="P4"><text:span text:style-name="T1"><text:s text:c="4"/></text:span><text:span text:style-name="T2"><text:s/>2013 <text:s text:c="8"/>Victor Technologies</text:span></text:p>
      <text:p text:style-name="P10"><text:s text:c="23"/>Maintain and Repair CNC Equipment, Laser Marking Systems, and Various Product Testing Equipment.</text:p>
      <text:p text:style-name="P9"><text:s text:c="2"/></text:p>
      <text:p text:style-name="P4"><text:s text:c="5"/>2012 <text:s text:c="8"/>PIN Inc. (Professional Installation Networks)</text:p>
      <text:p text:style-name="P4"><text:s text:c="23"/>Maintain and Repair CNC Equipment ( Homag, Weeke, Koch), Vacuum Pump Systems, Trash Auger.</text:p>
      <text:p text:style-name="P4"><text:s text:c="24"/>D.W. Distributors <text:s/>(only for 2 weeks)</text:p>
      <text:p text:style-name="P4"/>
      <text:p text:style-name="P5"><text:s text:c="5"/>2011 <text:s text:c="8"/>JC Penney Maintenance Technician and Forklift Technician </text:p>
      <text:p text:style-name="P4"><text:s text:c="22"/>Maintain regular and specialized PC/PLC conveyor systems, forklifts, personnel lifts, batteries and chargers.</text:p>
      <text:p text:style-name="P4"/>
      <text:p text:style-name="P4"><text:s text:c="5"/>2010 <text:s text:c="8"/>Temporary worker through: ProStaff at <text:s/>Atlas Copco <text:span text:style-name="T1">and <text:s/></text:span><text:span text:style-name="T2">Ram Global Services at Stanley Mechanics Tools</text:span></text:p>
      <text:p text:style-name="P4"><text:s text:c="22"/>Maintained and Repair CNC Equipment.</text:p>
      <text:p text:style-name="P4"/>
      <text:p text:style-name="P4">2007-2010 <text:s text:c="4"/>Maintenance Mechanic Lockheed Martin Aero</text:p>
      <text:p text:style-name="P4"><text:s text:c="22"/>Maintain CNC and Manual equipment including lathes, shears, brakes, lasers, and lifting equipment. </text:p>
      <text:p text:style-name="P4"/>
      <text:p text:style-name="P4">2005-2007 <text:s text:c="4"/>Maintenance Technician, Comforce/Siemens, Siemens SEA</text:p>
      <text:p text:style-name="P4"><text:s text:c="22"/>Maintain and repair CNC, PLC, and Manual metal punching and forming equipment. </text:p>
      <text:p text:style-name="P4"><text:s/></text:p>
      <text:p text:style-name="P4">1982-2005 <text:s text:c="8"/>This work history is available up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orphans="0" fo:widows="0" fo:hyphenation-ladder-count="no-limit" style:text-autospace="none" style:punctuation-wrap="simple" style:writing-mode="lr-tb"/>
      <style:text-properties style:use-window-font-color="true" style:font-name="Times New Roman1" fo:font-size="10pt" fo:language="en" fo:country="US" style:font-name-asian="Times New Roma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0835in" fo:margin-bottom="0.0835in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WW-caption" style:family="paragraph" style:parent-style-name="Standard">
      <style:paragraph-properties fo:margin-top="0.0835in" fo:margin-bottom="0.0835in"/>
      <style:text-properties fo:font-size="12pt" fo:font-style="italic" style:font-size-asian="12pt" style:font-style-asian="italic" style:font-size-complex="12pt" style:font-style-complex="italic"/>
    </style:style>
    <style:style style:name="WW-caption1" style:family="paragraph" style:parent-style-name="Standard">
      <style:paragraph-properties fo:margin-top="0.0835in" fo:margin-bottom="0.0835in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>
      <style:paragraph-properties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-header1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1992in" fo:margin-bottom="0.2in" fo:margin-left="0.3in" fo:margin-right="0.3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008in" fo:margin-left="0in" fo:margin-right="0in" fo:margin-bottom="0.2618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3in" fo:margin-right="0.3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2T18:56:03.18</dc:date>
    <meta:editing-duration>P23DT22H11M49S</meta:editing-duration>
    <meta:generator>OpenOffice.org/3.4.1$Win32 OpenOffice.org_project/341m1$Build-9593</meta:generator>
    <meta:document-statistic meta:table-count="0" meta:image-count="0" meta:object-count="0" meta:page-count="1" meta:paragraph-count="36" meta:word-count="422" meta:character-count="3444"/>
    <meta:editing-cycles>1</meta:editing-cycles>
  </office:meta>
</office:document-meta>
</file>