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5089CC7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writing-mode="lr-tb"/>
    </style:style>
    <style:style style:name="P2" style:family="paragraph" style:parent-style-name="Standard">
      <style:paragraph-properties fo:line-height="100%" fo:text-align="start" style:justify-single-word="false" style:writing-mode="lr-tb"/>
      <style:text-properties officeooo:paragraph-rsid="00114048"/>
    </style:style>
    <style:style style:name="P3" style:family="paragraph" style:parent-style-name="Standard">
      <style:paragraph-properties fo:line-height="100%" fo:text-align="center" style:justify-single-word="false" style:writing-mode="lr-tb"/>
    </style:style>
    <style:style style:name="P4" style:family="paragraph" style:parent-style-name="Standard">
      <style:paragraph-properties fo:line-height="100%" fo:text-align="start" style:justify-single-word="false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officeooo:paragraph-rsid="000fe2c2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 style:writing-mode="lr-tb"/>
      <style:text-properties fo:color="#666666" style:text-line-through-style="none" style:text-line-through-type="none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7" style:family="paragraph" style:parent-style-name="Standard">
      <style:paragraph-properties fo:line-height="100%" fo:text-align="start" style:justify-single-word="false" style:writing-mode="lr-tb"/>
      <style:text-properties fo:font-weight="normal" officeooo:paragraph-rsid="0011e338" style:font-weight-asian="normal" style:font-weight-complex="normal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weight="normal" officeooo:rsid="00114048" officeooo:paragraph-rsid="00114048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 style:writing-mode="lr-tb"/>
      <style:text-properties fo:font-weight="bold" officeooo:rsid="00114048" officeooo:paragraph-rsid="00114048" style:font-weight-asian="bold" style:font-weight-complex="bold"/>
    </style:style>
    <style:style style:name="P11" style:family="paragraph" style:parent-style-name="Standard">
      <style:paragraph-properties fo:margin-left="0in" fo:margin-right="-0.1252in" fo:line-height="100%" fo:text-align="start" style:justify-single-word="false" fo:text-indent="0in" style:auto-text-indent="false" style:writing-mode="lr-tb"/>
    </style:style>
    <style:style style:name="P12" style:family="paragraph" style:parent-style-name="Standard">
      <style:paragraph-properties fo:margin-left="0.5in" fo:margin-right="0in" fo:line-height="100%" fo:text-align="start" style:justify-single-word="false" fo:text-indent="0in" style:auto-text-indent="false" style:writing-mode="lr-tb"/>
      <style:text-properties fo:color="#ffffff" style:text-line-through-style="none" style:text-line-through-type="none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3" style:family="paragraph" style:parent-style-name="Standard">
      <style:paragraph-properties fo:margin-left="0.5in" fo:margin-right="0in" fo:line-height="100%" fo:text-align="start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75in" fo:margin-right="0in" fo:line-height="100%" fo:text-align="start" style:justify-single-word="false" fo:text-indent="0in" style:auto-text-indent="false" style:writing-mode="lr-tb"/>
    </style:style>
    <style:style style:name="P15" style:family="paragraph" style:parent-style-name="Standard">
      <style:paragraph-properties fo:margin-left="0.75in" fo:margin-right="0in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.5in" style:auto-text-indent="false" style:writing-mode="lr-tb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.5in" style:auto-text-indent="false" style:writing-mode="lr-tb"/>
      <style:text-properties fo:color="#666666" style:text-line-through-style="none" style:text-line-through-type="none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8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1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23" style:family="paragraph" style:parent-style-name="Standard" style:master-page-name="Standard">
      <style:paragraph-properties fo:line-height="100%" fo:text-align="start" style:justify-single-word="false" style:page-number="auto" style:writing-mode="lr-tb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11e338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6" style:family="text">
      <style:text-properties style:font-name="Times New Roman" fo:font-size="10pt" fo:font-style="italic" officeooo:rsid="0011e338" style:font-name-asian="Times New Roman1" style:font-size-asian="10pt" style:font-style-asian="italic" style:font-name-complex="Times New Roman1" style:font-size-complex="10pt" style:font-style-complex="italic"/>
    </style:style>
    <style:style style:name="T7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T8" style:family="text">
      <style:text-properties fo:color="#000099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9" style:family="text">
      <style:text-properties fo:color="#666666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fo:color="#666666" style:text-line-through-style="none" style:text-line-through-type="none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fo:color="#ffffff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14048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0pt" fo:font-style="normal" style:text-underline-style="none" fo:font-weight="bold" officeooo:rsid="00114048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6" style:family="text">
      <style:text-properties fo:color="#000000" style:text-line-through-style="none" style:text-line-through-type="none" style:font-name="Times New Roman" fo:font-size="10pt" fo:font-style="normal" style:text-underline-style="none" style:font-name-asian="Times New Roman1" style:font-size-asian="10pt" style:font-style-asian="normal" style:font-name-complex="Times New Roman1" style:font-size-complex="10pt" style:font-style-complex="normal"/>
    </style:style>
    <style:style style:name="T17" style:family="text">
      <style:text-properties fo:color="#000000" style:text-line-through-style="none" style:text-line-through-type="none" style:font-name="Times New Roman" fo:font-size="10pt" fo:font-style="normal" style:text-underline-style="none" officeooo:rsid="00114048" style:font-name-asian="Times New Roman1" style:font-size-asian="10pt" style:font-style-asian="normal" style:font-name-complex="Times New Roman1" style:font-size-complex="10pt" style:font-style-complex="normal"/>
    </style:style>
    <style:style style:name="T18" style:family="text">
      <style:text-properties fo:color="#000000" style:text-line-through-style="none" style:text-line-through-type="none" style:font-name="Times New Roman" fo:font-size="10pt" fo:font-style="normal" style:text-underline-style="none" officeooo:rsid="0011e338" style:font-name-asian="Times New Roman1" style:font-size-asian="10pt" style:font-style-asian="normal" style:font-name-complex="Times New Roman1" style:font-size-complex="10pt" style:font-style-complex="normal"/>
    </style:style>
    <style:style style:name="T19" style:family="text">
      <style:text-properties fo:color="#000000" style:text-line-through-style="none" style:text-line-through-type="none" style:font-name="Times New Roman" fo:font-size="10pt" fo:font-style="normal" style:text-underline-style="none" officeooo:rsid="0011e338" fo:background-color="#ffff00" loext:char-shading-value="0" style:font-name-asian="Times New Roman1" style:font-size-asian="10pt" style:font-style-asian="normal" style:font-name-complex="Times New Roman1" style:font-size-complex="10pt" style:font-style-complex="normal"/>
    </style:style>
    <style:style style:name="T20" style:family="text">
      <style:text-properties officeooo:rsid="000fe2c2"/>
    </style:style>
    <style:style style:name="T21" style:family="text">
      <style:text-properties fo:font-style="italic" officeooo:rsid="000fe2c2" style:font-style-asian="italic" style:font-style-complex="italic"/>
    </style:style>
    <style:style style:name="T22" style:family="text">
      <style:text-properties fo:font-weight="bold" officeooo:rsid="000fe2c2" style:font-weight-asian="bold" style:font-weight-complex="bold"/>
    </style:style>
    <style:style style:name="T23" style:family="text">
      <style:text-properties officeooo:rsid="000fe2c2" fo:background-color="#ffff00" loext:char-shading-value="0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Picture" text:anchor-type="as-char" svg:width="2.1146in" svg:height="1.8484in" draw:z-index="0"><draw:image xlink:href="Pictures/10000000000000A0000000A05089CC76.jpg" xlink:type="simple" xlink:show="embed" xlink:actuate="onLoad"/><svg:desc>Michael Campbell</svg:desc></draw:frame></text:p>
      <text:p text:style-name="P11"><text:span text:style-name="T1"><text:s/>Michael Campbell</text:span></text:p>
      <text:p text:style-name="P1"><text:span text:style-name="T2">3130 Sturgis Westpoint Rd  •  Sturgis , Mississippi 39769</text:span></text:p>
      <text:p text:style-name="P1"><text:a xlink:type="simple" xlink:href="mailto:email@domain.com" text:style-name="Internet_20_link" text:visited-style-name="Visited_20_Internet_20_Link"><text:span text:style-name="Internet_20_link">michael</text:span></text:a><text:a xlink:type="simple" xlink:href="mailto:email@domain.com" text:style-name="Internet_20_link" text:visited-style-name="Visited_20_Internet_20_Link"><text:span text:style-name="Internet_20_link">.</text:span></text:a><text:a xlink:type="simple" xlink:href="mailto:email@domain.com" text:style-name="Internet_20_link" text:visited-style-name="Visited_20_Internet_20_Link"><text:span text:style-name="Internet_20_link">campbell</text:span></text:a><text:a xlink:type="simple" xlink:href="mailto:email@domain.com" text:style-name="Internet_20_link" text:visited-style-name="Visited_20_Internet_20_Link"><text:span text:style-name="Internet_20_link">.</text:span></text:a><text:a xlink:type="simple" xlink:href="mailto:email@domain.com" text:style-name="Internet_20_link" text:visited-style-name="Visited_20_Internet_20_Link"><text:span text:style-name="Internet_20_link">msu</text:span></text:a><text:a xlink:type="simple" xlink:href="mailto:email@domain.com" text:style-name="Internet_20_link" text:visited-style-name="Visited_20_Internet_20_Link"><text:span text:style-name="Internet_20_link">@</text:span></text:a><text:a xlink:type="simple" xlink:href="mailto:email@domain.com" text:style-name="Internet_20_link" text:visited-style-name="Visited_20_Internet_20_Link"><text:span text:style-name="Internet_20_link">gmail</text:span></text:a><text:a xlink:type="simple" xlink:href="mailto:email@domain.com" text:style-name="Internet_20_link" text:visited-style-name="Visited_20_Internet_20_Link"><text:span text:style-name="Internet_20_link">.</text:span></text:a><text:a xlink:type="simple" xlink:href="mailto:email@domain.com" text:style-name="Internet_20_link" text:visited-style-name="Visited_20_Internet_20_Link"><text:span text:style-name="Internet_20_link">com</text:span></text:a> <text:span text:style-name="T2"> • 918-470-3949</text:span></text:p>
      <text:p text:style-name="P4"/>
      <text:p text:style-name="P1"><text:span text:style-name="T9">OBJECTIVE</text:span> <text:span text:style-name="T11">....</text:span></text:p>
      <text:p text:style-name="P12"/>
      <text:p text:style-name="P14"><text:span text:style-name="T2">My <text:s/>main goals is to further develop my welding, fabrication, and leadership capabilities .</text:span></text:p>
      <text:p text:style-name="P15"/>
      <text:p text:style-name="P14"><text:span text:style-name="T2">My second goal is to become a <text:s/>forward thinking asset that has the ability to help grow the individuals and the team I serve.</text:span></text:p>
      <text:p text:style-name="P4"/>
      <text:p text:style-name="P4"/>
      <text:p text:style-name="P1"><text:span text:style-name="T9">EXPERIENCE</text:span></text:p>
      <text:p text:style-name="P16"><text:span text:style-name="T4">P&amp;G Rentals </text:span><text:s/><text:span text:style-name="T2">  Farmington , New Mexico <text:s/>May 1994 - May 1996</text:span></text:p>
      <text:p text:style-name="P16"><text:span text:style-name="T5">Equipment Service Technician</text:span></text:p>
      <text:list xml:id="list4136382203162707190" text:style-name="WWNum2">
        <text:list-item>
          <text:p text:style-name="P18"><text:span text:style-name="T2">I was responsible for servicing/repairing construction equipment that was rented by various area construction companies.</text:span></text:p>
        </text:list-item>
        <text:list-item>
          <text:p text:style-name="P18"><text:span text:style-name="T2">Much of this equipment was oil and gas related. At that time P&amp;G rented it all, from backhoe's to scaffolding.</text:span></text:p>
        </text:list-item>
        <text:list-item>
          <text:p text:style-name="P18"><text:span text:style-name="T2">Our company assets combined were valued at more than $4 million. This job truly taught me the value of safety foresight, and co worker communication because on any given day you had a vast degree of equipment at different locations in all kinds of conditions.</text:span></text:p>
        </text:list-item>
        <text:list-item>
          <text:p text:style-name="P18"><text:span text:style-name="T2">As a young man you really had to be on your toes to avoid the pinch and smash factor.</text:span></text:p>
        </text:list-item>
      </text:list>
      <text:p text:style-name="P4"/>
      <text:p text:style-name="P16"><text:span text:style-name="T4">Local 412 New Mexico J&amp;B Mechanical </text:span><text:s/><text:span text:style-name="T2">  Albuquerque, New Mexico <text:s/>June 1996 - January <text:s/>2000</text:span></text:p>
      <text:p text:style-name="P16"><text:span text:style-name="T5">Plumber/Pipe-fitter/Welder</text:span></text:p>
      <text:list xml:id="list245812861965429799" text:style-name="WWNum3">
        <text:list-item>
          <text:p text:style-name="P19"><text:span text:style-name="T2">As a Union Mechanical member I was responsible for the safe and proper installation of piping systems all across the southwest part of the country.</text:span></text:p>
        </text:list-item>
        <text:list-item>
          <text:p text:style-name="P19"><text:span text:style-name="T2">We also constructed a large degree of prefabricated elements for the oil and gas industry in Northern New Mexico at J&amp;B Mechanical.</text:span></text:p>
        </text:list-item>
        <text:list-item>
          <text:p text:style-name="P19"><text:span text:style-name="T2">This job really help develop my eye for craftsmanship and design.</text:span></text:p>
        </text:list-item>
        <text:list-item>
          <text:p text:style-name="P19"><text:span text:style-name="T2">I had the opportunity to learn and work with some of the best Welders Fitters and Plumbers in the country.</text:span></text:p>
        </text:list-item>
      </text:list>
      <text:p text:style-name="P5"><text:s text:c="8"/><text:tab/></text:p>
      <text:p text:style-name="P5"><text:span text:style-name="T22"><text:tab/>Casey Industries, Luling, LA <text:s/>Shutdown </text:span><text:span text:style-name="T20">October </text:span><text:span text:style-name="T23">1-17 2014</text:span></text:p>
      <text:p text:style-name="P5"><text:tab/><text:span text:style-name="T21">Pipe-fitter/Rigging/Structural Fitter</text:span><text:span text:style-name="T20"> </text:span></text:p>
      <text:p text:style-name="P5"><text:span text:style-name="T20"><text:s text:c="9"/>* Designed 12” and 14” inch pipe supports for CWS piping </text:span></text:p>
      <text:p text:style-name="P5"><text:s text:c="9"/>* <text:span text:style-name="T20">Fitted and prefabricated 6”, 8”, 12”, 14” pipe fitting and hung valves </text:span></text:p>
      <text:p text:style-name="P4"><text:span text:style-name="T22"><text:s text:c="9"/>*</text:span><text:span text:style-name="T20"> Interpreted and followed ISO-prints to construct piping with field verification in mind.</text:span></text:p>
      <text:p text:style-name="P16"/>
      <text:p text:style-name="P16"/>
      <text:p text:style-name="P16"><text:span text:style-name="T4">Bravo Company 1-504th Parachute Infantry Regiment <text:s/></text:span><text:span text:style-name="T2">Ft Bragg, North Carolina,</text:span> <text:span text:style-name="T2">April 2000 - January 2004</text:span></text:p>
      <text:p text:style-name="P16"><text:span text:style-name="T2"/></text:p>
      <text:p text:style-name="P16"><text:span text:style-name="T5">U.S Army Paratrooper</text:span></text:p>
      <text:list xml:id="list6081594166874555707" text:style-name="WWNum4">
        <text:list-item>
          <text:p text:style-name="P20"><text:span text:style-name="T2">As a young team leader on my first deployment I was the responsible for the safety and welfare of 4 men and nearly 1 million dollars worth of equipment at all times. </text:span></text:p>
        </text:list-item>
        <text:list-item>
          <text:p text:style-name="P20"><text:span text:style-name="T2">During my second deployment to Iraq I was asked again to serve as Bco 1st platoon 4th squad Alpha team leader. <text:s text:c="2"/></text:span></text:p>
        </text:list-item>
      </text:list>
      <text:p text:style-name="P4"/>
      <text:p text:style-name="P16"><text:span text:style-name="T4">Campbell Tree &amp; Consulting </text:span><text:s/><text:span text:style-name="T2">  Sturgis, Mississippi <text:s/>May 2009 - Present</text:span></text:p>
      <text:p text:style-name="P16"><text:soft-page-break/><text:span text:style-name="T5">Owner Operator</text:span></text:p>
      <text:list xml:id="list7772709961011467738" text:style-name="WWNum5">
        <text:list-item>
          <text:p text:style-name="P21"><text:span text:style-name="T2">At Campbell Tree &amp; Consulting we offer a wide range of land management services.</text:span></text:p>
        </text:list-item>
        <text:list-item>
          <text:p text:style-name="P21"><text:span text:style-name="T2">As a state registered Forester we conduct timber evaluations, statistical computations, tract, volume, and health analysis.</text:span></text:p>
        </text:list-item>
        <text:list-item>
          <text:p text:style-name="P21"><text:span text:style-name="T2">We offer custom forage production and range management as well.</text:span></text:p>
        </text:list-item>
        <text:list-item>
          <text:p text:style-name="P21"><text:span text:style-name="T2">This company has taught me how to juggle logistical issues in my sleep and prevent them from become real life nightmares.</text:span></text:p>
        </text:list-item>
      </text:list>
      <text:p text:style-name="P4"/>
      <text:p text:style-name="P1"><text:span text:style-name="T9">EDUCATION</text:span></text:p>
      <text:p text:style-name="P16"><text:span text:style-name="T4">Mississippi State University College of Forest Resources </text:span><text:s/><text:span text:style-name="T2">  Starkville, Mississippi <text:s text:c="2"/>Graduated <text:s text:c="3"/>May 2010</text:span></text:p>
      <text:p text:style-name="P13"><text:span text:style-name="T5">Bachelors of Science in Forest Management , GPA 2.8</text:span></text:p>
      <text:p text:style-name="P1"><text:span text:style-name="T2"><text:tab/></text:span></text:p>
      <text:p text:style-name="P2"><text:span text:style-name="T12"><text:tab/></text:span><text:span text:style-name="T14">East Mississippi Community College <text:s text:c="4"/></text:span><text:span text:style-name="T13">Columbus, Mississippi <text:s text:c="2"/>Completed <text:s text:c="2"/>June 2014</text:span></text:p>
      <text:p text:style-name="P7"><text:span text:style-name="T2"><text:tab/></text:span><text:span text:style-name="T6">Completed 3 semesters of Pipe fitting courses as a refresher </text:span><text:span text:style-name="T18">and obtained my </text:span><text:span text:style-name="T19">NCCER</text:span><text:span text:style-name="T16"> <text:s text:c="3"/></text:span><text:span text:style-name="T15"><text:s text:c="2"/></text:span></text:p>
      <text:p text:style-name="P7"/>
      <text:p text:style-name="P7"><text:span text:style-name="T14"><text:s text:c="25"/>1.Basic pipe-fitting </text:span></text:p>
      <text:p text:style-name="P9"><text:span text:style-name="T17"><text:s text:c="25"/>2. Intermediate Pipe-fitting</text:span></text:p>
      <text:p text:style-name="P10"><text:span text:style-name="T16"><text:s text:c="25"/>3.Advanced Pipe-fitting </text:span></text:p>
      <text:p text:style-name="P8"><text:span text:style-name="T16"/></text:p>
      <text:p text:style-name="P16"><text:span text:style-name="T4">East Mississippi Community College</text:span><text:span text:style-name="T2"> <text:s text:c="4"/>Columbus, Mississippi <text:s text:c="2"/>Completed <text:s text:c="2"/>June 2014 </text:span></text:p>
      <text:p text:style-name="P1"><text:span text:style-name="T2"><text:tab/></text:span><text:span text:style-name="T5">Completed 3 semesters of Welding or 1 year experience as a refresher</text:span></text:p>
      <text:p text:style-name="P16"><text:span text:style-name="T2"><text:s text:c="7"/></text:span><text:span text:style-name="T4"><text:s/></text:span></text:p>
      <text:p text:style-name="P13"><text:span text:style-name="T4"><text:s text:c="9"/>1. Basic Welding Course </text:span></text:p>
      <text:p text:style-name="P1"><text:span text:style-name="T4"><text:s text:c="24"/>2. Intermediate Welding Course </text:span></text:p>
      <text:p text:style-name="P1"><text:span text:style-name="T4"><text:s text:c="24"/>3 <text:s/>Advanced Welding Course </text:span></text:p>
      <text:p text:style-name="P6"/>
      <text:p text:style-name="P1"><text:span text:style-name="T9">SKILLS</text:span></text:p>
      <text:p text:style-name="P17"/>
      <text:list xml:id="list5711881423989849426" text:style-name="WWNum6">
        <text:list-item>
          <text:p text:style-name="P22"><text:span text:style-name="T2">Wood design</text:span></text:p>
        </text:list-item>
        <text:list-item>
          <text:p text:style-name="P22"><text:span text:style-name="T2">Metal work </text:span></text:p>
        </text:list-item>
        <text:list-item>
          <text:p text:style-name="P22"><text:span text:style-name="T2">Welding </text:span></text:p>
        </text:list-item>
        <text:list-item>
          <text:p text:style-name="P22"><text:span text:style-name="T2">Plumbing </text:span></text:p>
        </text:list-item>
        <text:list-item>
          <text:p text:style-name="P22"><text:span text:style-name="T2">Prefabrication </text:span></text:p>
        </text:list-item>
        <text:list-item>
          <text:p text:style-name="P22"><text:span text:style-name="T2">Equipment maintenance and Service </text:span></text:p>
        </text:list-item>
        <text:list-item>
          <text:p text:style-name="P22"><text:span text:style-name="T2">Public Speaking</text:span></text:p>
        </text:list-item>
        <text:list-item>
          <text:p text:style-name="P22"><text:span text:style-name="T2">Software operation </text:span></text:p>
        </text:list-item>
        <text:list-item>
          <text:p text:style-name="P22"><text:span text:style-name="T2">Documentation </text:span></text:p>
        </text:list-item>
        <text:list-item>
          <text:p text:style-name="P22"><text:span text:style-name="T2">Fitting- Structural/Pipe <text:s/></text:span></text:p>
        </text:list-item>
      </text:list>
      <text:p text:style-name="P4"/>
      <text:p text:style-name="P4"/>
      <text:p text:style-name="P1"><text:span text:style-name="T9">LANGUAGES</text:span></text:p>
      <text:p text:style-name="P17"/>
      <text:p text:style-name="P14"><text:span text:style-name="T2">English</text:span></text:p>
      <text:p text:style-name="P14"><text:span text:style-name="T2">Spanish</text:span></text:p>
      <text:p text:style-name="P4"/>
      <text:p text:style-name="P4"/>
      <text:p text:style-name="P1"><text:span text:style-name="T9">INTERESTS</text:span></text:p>
      <text:p text:style-name="P17"/>
      <text:p text:style-name="P14"><text:span text:style-name="T2">Wood design</text:span></text:p>
      <text:p text:style-name="P14"><text:span text:style-name="T2">Veteran issues</text:span></text:p>
      <text:p text:style-name="P14"><text:span text:style-name="T2">Family</text:span></text:p>
      <text:p text:style-name="P14"><text:span text:style-name="T2">Travel</text:span></text:p>
      <text:p text:style-name="P4"/>
      <text:p text:style-name="P4"/>
      <text:p text:style-name="P1"><text:span text:style-name="T9">AFFILIATIONS</text:span></text:p>
      <text:p text:style-name="P17"/>
      <text:p text:style-name="P14"><text:span text:style-name="T2">Former State Director and Mississippi State University chapter Vice President of Student Veterans of America (2007-2008)</text:span></text:p>
      <text:p text:style-name="P14"><text:span text:style-name="T2">Former South East Regional Director Student Veterans of America (2008-2009)</text:span></text:p>
      <text:p text:style-name="P14"><text:span text:style-name="T2">Former National President of the Student Veterans of America (2009-2010)</text:span></text:p>
      <text:p text:style-name="P4"><text:soft-page-break/></text:p>
      <text:p text:style-name="P4"/>
      <text:p text:style-name="P1"><text:span text:style-name="T9">REFERENCES</text:span></text:p>
      <text:p text:style-name="P3"><text:span text:style-name="T7">References are available upon reques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default-outline-level="" style:class="text">
      <style:paragraph-properties fo:margin-top="0.5in" fo:margin-bottom="0.25in" loext:contextual-spacing="false" fo:line-height="100%" fo:text-align="start" style:justify-single-word="false" style:writing-mode="lr-tb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4063in" fo:margin-bottom="0.2118in" loext:contextual-spacing="false" fo:line-height="100%" fo:text-align="start" style:justify-single-word="false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361in" fo:margin-bottom="0.222in" loext:contextual-spacing="false" fo:line-height="100%" fo:text-align="start" style:justify-single-word="false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3437in" fo:margin-bottom="0.2047in" loext:contextual-spacing="false" fo:line-height="100%" fo:text-align="start" style:justify-single-word="false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Standard" style:default-outline-level="" style:class="text">
      <style:paragraph-properties fo:margin-top="0.3299in" fo:margin-bottom="0.2047in" loext:contextual-spacing="false" fo:line-height="100%" fo:text-align="start" style:justify-single-word="false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6" style:display-name="Heading 6" style:family="paragraph" style:parent-style-name="Standard" style:default-outline-level="" style:class="text">
      <style:paragraph-properties fo:margin-top="0.389in" fo:margin-bottom="0.278in" loext:contextual-spacing="false" fo:line-height="100%" fo:text-align="start" style:justify-single-word="false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No_20_List" style:display-name="No Lis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3335in" fo:margin-bottom="0.0835in" loext:contextual-spacing="false" fo:line-height="100%" fo:text-align="start" style:justify-single-word="false" fo:keep-together="always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default-outline-level="" style:class="chapter">
      <style:paragraph-properties fo:margin-top="0.25in" fo:margin-bottom="0.0555in" loext:contextual-spacing="false" fo:line-height="100%" fo:text-align="start" style:justify-single-word="false" fo:keep-together="always" fo:keep-with-next="always" style:writing-mode="lr-tb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nothing" fo:margin-left="0.2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nothing" fo:margin-left="0.75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nothing" fo:margin-left="1.3752in"/>
        </style:list-level-properties>
        <style:text-properties style:font-name="Arial1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nothing" fo:margin-left="1.75in"/>
        </style:list-level-properties>
        <style:text-properties style:font-name="Arial1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nothing" fo:margin-left="2.2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nothing" fo:margin-left="2.8752in"/>
        </style:list-level-properties>
        <style:text-properties style:font-name="Arial1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nothing" fo:margin-left="3.25in"/>
        </style:list-level-properties>
        <style:text-properties style:font-name="Arial1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nothing" fo:margin-left="3.75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nothing" fo:margin-left="4.3752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nothing" fo:margin-left="0.2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nothing" fo:margin-left="0.75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nothing" fo:margin-left="1.3752in"/>
        </style:list-level-properties>
        <style:text-properties style:font-name="Arial1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nothing" fo:margin-left="1.75in"/>
        </style:list-level-properties>
        <style:text-properties style:font-name="Arial1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nothing" fo:margin-left="2.2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nothing" fo:margin-left="2.8752in"/>
        </style:list-level-properties>
        <style:text-properties style:font-name="Arial1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nothing" fo:margin-left="3.25in"/>
        </style:list-level-properties>
        <style:text-properties style:font-name="Arial1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nothing" fo:margin-left="3.75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nothing" fo:margin-left="4.3752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nothing" fo:margin-left="0.2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nothing" fo:margin-left="0.75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nothing" fo:margin-left="1.3752in"/>
        </style:list-level-properties>
        <style:text-properties style:font-name="Arial1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nothing" fo:margin-left="1.75in"/>
        </style:list-level-properties>
        <style:text-properties style:font-name="Arial1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nothing" fo:margin-left="2.2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nothing" fo:margin-left="2.8752in"/>
        </style:list-level-properties>
        <style:text-properties style:font-name="Arial1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nothing" fo:margin-left="3.25in"/>
        </style:list-level-properties>
        <style:text-properties style:font-name="Arial1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nothing" fo:margin-left="3.75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nothing" fo:margin-left="4.3752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nothing" fo:margin-left="0.2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nothing" fo:margin-left="0.75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nothing" fo:margin-left="1.3752in"/>
        </style:list-level-properties>
        <style:text-properties style:font-name="Arial1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nothing" fo:margin-left="1.75in"/>
        </style:list-level-properties>
        <style:text-properties style:font-name="Arial1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nothing" fo:margin-left="2.2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nothing" fo:margin-left="2.8752in"/>
        </style:list-level-properties>
        <style:text-properties style:font-name="Arial1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nothing" fo:margin-left="3.25in"/>
        </style:list-level-properties>
        <style:text-properties style:font-name="Arial1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nothing" fo:margin-left="3.75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nothing" fo:margin-left="4.3752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nothing" fo:margin-left="0.2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nothing" fo:margin-left="0.75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nothing" fo:margin-left="1.3752in"/>
        </style:list-level-properties>
        <style:text-properties style:font-name="Arial1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nothing" fo:margin-left="1.75in"/>
        </style:list-level-properties>
        <style:text-properties style:font-name="Arial1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nothing" fo:margin-left="2.2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nothing" fo:margin-left="2.8752in"/>
        </style:list-level-properties>
        <style:text-properties style:font-name="Arial1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nothing" fo:margin-left="3.25in"/>
        </style:list-level-properties>
        <style:text-properties style:font-name="Arial1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nothing" fo:margin-left="3.75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nothing" fo:margin-left="4.3752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2</meta:editing-cycles>
    <meta:editing-duration>PT4M49S</meta:editing-duration>
    <meta:generator>LibreOffice/4.3.2.2$Windows_x86 LibreOffice_project/edfb5295ba211bd31ad47d0bad0118690f76407d</meta:generator>
    <dc:date>2014-10-22T07:52:12.269000000</dc:date>
    <meta:document-statistic meta:table-count="0" meta:image-count="1" meta:object-count="0" meta:page-count="3" meta:paragraph-count="76" meta:word-count="633" meta:character-count="4188" meta:non-whitespace-character-count="3395"/>
  </office:meta>
</office:document-meta>
</file>