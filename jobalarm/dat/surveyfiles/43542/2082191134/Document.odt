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Brandon Russell</text:span></text:p>
      <text:p text:style-name="P1"><text:span text:style-name="T1">124 Oakhill Dr </text:span></text:p>
      <text:p text:style-name="P1"><text:span text:style-name="T1">Weatherford TX 76086</text:span></text:p>
      <text:p text:style-name="P1"><text:span text:style-name="T1">208-219-1134</text:span></text:p>
      <text:p text:style-name="P2"><text:span text:style-name="T1"/></text:p>
      <text:p text:style-name="P2"><text:span text:style-name="T1"/></text:p>
      <text:p text:style-name="P2"><text:span text:style-name="T1">Job Skills:Basic hand tools,heavy equipment,light duty equipment,maintance,2+years mig welding with hard wire,dualsheild,fluxcore,some arc welding,,iron working,jlg man lift,skidsteer,loader,forklift,30 ton over head crane,vertical and horizontal saw,spot welder</text:span></text:p>
      <text:p text:style-name="P2"><text:span text:style-name="T1"/></text:p>
      <text:p text:style-name="P2"><text:span text:style-name="T1">Objectives:Looking for a good stable company to work for and advance with.I am a fast learner and take pride in my work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Job Profile</text:span></text:p>
      <text:p text:style-name="P2"><text:span text:style-name="T1"/></text:p>
      <text:p text:style-name="P2"><text:span text:style-name="T1">Mar,2013-Aug,2013</text:span></text:p>
      <text:p text:style-name="P2"><text:span text:style-name="T1">A Better Fab</text:span></text:p>
      <text:p text:style-name="P2"><text:span text:style-name="T1">FM 920 Weatherford TX</text:span></text:p>
      <text:p text:style-name="P2"><text:span text:style-name="T1">817-658-4294</text:span></text:p>
      <text:p text:style-name="P2"><text:span text:style-name="T1">Job title: Welder</text:span></text:p>
      <text:p text:style-name="P2"><text:span text:style-name="T1">Job duties: fit and weld jobs in shop and in feild Mig welding and acr welding</text:span></text:p>
      <text:p text:style-name="P2"><text:span text:style-name="T1">Pay:15.00 per hr </text:span></text:p>
      <text:p text:style-name="P2"><text:span text:style-name="T1">Supervisor Dearl Beirer</text:span></text:p>
      <text:p text:style-name="P2"><text:span text:style-name="T1"/></text:p>
      <text:p text:style-name="P2"><text:span text:style-name="T1">Oct,2012-Feb,2013</text:span></text:p>
      <text:p text:style-name="P2"><text:span text:style-name="T1">Tekko enterprise</text:span></text:p>
      <text:p text:style-name="P2"><text:span text:style-name="T1">1485 Jamesway </text:span></text:p>
      <text:p text:style-name="P2"><text:span text:style-name="T1">Tooele Utah</text:span></text:p>
      <text:p text:style-name="P2"><text:span text:style-name="T1">435-843-8317</text:span></text:p>
      <text:p text:style-name="P2"><text:span text:style-name="T1">Job title:Welder/Iron Worker</text:span></text:p>
      <text:p text:style-name="P2"><text:span text:style-name="T1">Job duties:Fitt,Weld jobs in shop and out in field Mig welding and some arc welding </text:span></text:p>
      <text:p text:style-name="P2"><text:span text:style-name="T1">Pay:15.00 per hr </text:span></text:p>
      <text:p text:style-name="P2"><text:span text:style-name="T1">Supervisor:Jason Walker</text:span></text:p>
      <text:p text:style-name="P2"><text:span text:style-name="T1"/></text:p>
      <text:p text:style-name="P2"><text:span text:style-name="T1">Sep,2011-Oct,2012</text:span></text:p>
      <text:p text:style-name="P2"><text:span text:style-name="T1">P.H.E Mech</text:span></text:p>
      <text:p text:style-name="P2"><text:span text:style-name="T1">1885 E ave</text:span></text:p>
      <text:p text:style-name="P2"><text:span text:style-name="T1">Tooele Utah</text:span></text:p>
      <text:p text:style-name="P2"><text:span text:style-name="T1">801-415-9154</text:span></text:p>
      <text:p text:style-name="P2"><text:span text:style-name="T1">Job title:Welder/Fitter</text:span></text:p>
      <text:p text:style-name="P2"><text:span text:style-name="T1">Job duties:Fitt and weld oil field equipment ready to go out in field Mig welding </text:span></text:p>
      <text:p text:style-name="P2"><text:span text:style-name="T1">Pay:15.00 per hr</text:span></text:p>
      <text:p text:style-name="P2"><text:span text:style-name="T1">Supervisor:Len Cuku</text:span></text:p>
      <text:p text:style-name="P2"><text:span text:style-name="T1"/></text:p>
      <text:p text:style-name="P2"><text:span text:style-name="T1">Dec,2009-Sept,2011</text:span></text:p>
      <text:p text:style-name="P2"><text:span text:style-name="T1">Dynamic Metal Fab</text:span></text:p>
      <text:p text:style-name="P2"><text:span text:style-name="T1">8991 welby Rd</text:span></text:p>
      <text:p text:style-name="P2"><text:span text:style-name="T1">Thornton CO</text:span></text:p>
      <text:p text:style-name="P2"><text:span text:style-name="T1">303-227-3180</text:span></text:p>
      <text:p text:style-name="P2"><text:span text:style-name="T1">Job title:Floater</text:span></text:p>
      <text:p text:style-name="P2"><text:span text:style-name="T1">Job duties:Work in all areas of shop shear,punch,saw,welding,maintance,grinding,spot welder</text:span></text:p>
      <text:p text:style-name="P2"><text:span text:style-name="T1">Pay:13.00 per hr</text:span></text:p>
      <text:p text:style-name="P2"><text:span text:style-name="T1">Supervisor:Larry Fox</text:span></text:p>
      <text:p text:style-name="P2"><text:span text:style-name="T1"/></text:p>
      <text:p text:style-name="P2"><text:span text:style-name="T1">Feb,2008-Dec,2008</text:span></text:p>
      <text:p text:style-name="P2"><text:span text:style-name="T1">O-Neal Steel</text:span></text:p>
      <text:p text:style-name="P2"><text:span text:style-name="T1">6300 Clermont St</text:span></text:p>
      <text:p text:style-name="P2"><text:span text:style-name="T1">Commerce City CO</text:span></text:p>
      <text:p text:style-name="P2"><text:span text:style-name="T1">1-800-322-1939</text:span></text:p>
      <text:p text:style-name="P2"><text:span text:style-name="T1">Job title:Lead Saw operator 2nd Shift</text:span></text:p>
      <text:p text:style-name="P2"><text:span text:style-name="T1">Job duties:fill and cut orders for the given orders for the night and make sure other oders from other saws where cut correctly</text:span></text:p>
      <text:p text:style-name="P2"><text:span text:style-name="T1">Pay:15.60 per hr </text:span></text:p>
      <text:p text:style-name="P2"><text:span text:style-name="T1">Supervisor:Rod Fisher</text:span></text:p>
      <text:p text:style-name="P2"><text:span text:style-name="T1"/></text:p>
      <text:p text:style-name="P2"><text:span text:style-name="T1">Mar,2006-Feb,2008</text:span></text:p>
      <text:p text:style-name="P2"><text:span text:style-name="T1">Moab Bit &amp;Tool</text:span></text:p>
      <text:p text:style-name="P2"><text:span text:style-name="T1">999 W 400N</text:span></text:p>
      <text:p text:style-name="P2"><text:span text:style-name="T1">Moab Utah </text:span></text:p>
      <text:p text:style-name="P2"><text:span text:style-name="T1">435-259-7763</text:span></text:p>
      <text:p text:style-name="P2"><text:span text:style-name="T1">Job title:Welder/Fitter/Bit tipper </text:span></text:p>
      <text:p text:style-name="P2"><text:span text:style-name="T1">Job duties:Weld and fit oil field bits and retip used bits </text:span></text:p>
      <text:p text:style-name="P2"><text:span text:style-name="T1">Pay:14.00 per hr </text:span></text:p>
      <text:p text:style-name="P2"><text:span text:style-name="T1">Supervisor:Dirk Phillip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