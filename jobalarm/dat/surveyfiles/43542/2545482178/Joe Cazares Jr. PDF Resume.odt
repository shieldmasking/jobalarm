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083in" fo:margin-right="-0.5in" fo:line-height="50%" fo:text-indent="0in" style:auto-text-indent="false"/>
    </style:style>
    <style:style style:name="P2" style:family="paragraph" style:parent-style-name="Standard">
      <style:paragraph-properties fo:margin-left="-0.5083in" fo:margin-right="-0.5in" fo:line-height="80%" fo:text-align="center" style:justify-single-word="false" fo:text-indent="0in"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3" style:family="paragraph" style:parent-style-name="Standard">
      <style:paragraph-properties fo:margin-left="-0.5083in" fo:margin-right="-0.5in" fo:line-height="69%" fo:text-indent="0in" style:auto-text-indent="false"/>
      <style:text-properties style:font-name="Times New Roman" fo:font-size="12pt" style:font-size-asian="12pt" style:font-name-complex="Times New Roman1" style:font-size-complex="12pt"/>
    </style:style>
    <style:style style:name="P4" style:family="paragraph" style:parent-style-name="Standard">
      <style:paragraph-properties fo:margin-left="-0.5083in" fo:margin-right="-0.5in" fo:line-height="80%" fo:text-indent="0in" style:auto-text-indent="false"/>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margin-left="-0.5083in" fo:margin-right="-0.5in" fo:line-height="80%" fo:text-indent="0in" style:auto-text-indent="false"/>
      <style:text-properties style:font-name="Times New Roman" fo:font-size="11pt" style:font-size-asian="11pt" style:font-name-complex="Times New Roman1" style:font-size-complex="11pt"/>
    </style:style>
    <style:style style:name="P6" style:family="paragraph" style:parent-style-name="Standard">
      <style:paragraph-properties fo:margin-left="-0.5083in" fo:margin-right="-0.5in" fo:line-height="80%" fo:text-indent="0in" style:auto-text-indent="false"/>
    </style:style>
    <style:style style:name="P7" style:family="paragraph" style:parent-style-name="Standard">
      <style:paragraph-properties fo:margin-left="-0.5083in" fo:margin-right="-0.5in" fo:margin-top="0in" fo:margin-bottom="0in" fo:line-height="80%" fo:text-align="center" style:justify-single-word="false" fo:text-indent="0in" style:auto-text-indent="false"/>
      <style:text-properties style:font-name="Arial Black" fo:font-size="16pt" style:font-size-asian="16pt" style:font-name-complex="Times New Roman1" style:font-size-complex="16pt"/>
    </style:style>
    <style:style style:name="P8" style:family="paragraph" style:parent-style-name="Standard">
      <style:paragraph-properties fo:margin-left="0in" fo:margin-right="-0.5in" fo:line-height="80%" fo:text-align="center" style:justify-single-word="false" fo:text-indent="0in"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9" style:family="paragraph" style:parent-style-name="Standard" style:master-page-name="Standard">
      <style:paragraph-properties fo:margin-left="-0.5083in" fo:margin-right="-0.5in" fo:margin-top="0in" fo:margin-bottom="0in" fo:line-height="80%" fo:text-align="center" style:justify-single-word="false" fo:text-indent="0in" style:auto-text-indent="false" style:page-number="auto"/>
      <style:text-properties style:font-name="Arial Black" fo:font-size="16pt" style:font-size-asian="16pt" style:font-name-complex="Times New Roman1" style:font-size-complex="16pt"/>
    </style:style>
    <style:style style:name="P10" style:family="paragraph" style:parent-style-name="Standard">
      <style:paragraph-properties fo:margin-left="-0.5083in" fo:margin-right="-0.5in" fo:line-height="80%" fo:text-align="start" style:justify-single-word="false" fo:text-indent="0in" style:auto-text-indent="false"/>
    </style:style>
    <style:style style:name="P11" style:family="paragraph" style:parent-style-name="Standard">
      <style:paragraph-properties fo:margin-left="-0.5083in" fo:margin-right="-0.5in" fo:line-height="80%" fo:text-indent="0in"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12" style:family="paragraph" style:parent-style-name="Standard">
      <style:paragraph-properties fo:margin-left="-0.5083in" fo:margin-right="-0.5in" fo:line-height="80%" fo:text-align="start" style:justify-single-word="false" fo:text-indent="0in"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13" style:family="paragraph" style:parent-style-name="Standard">
      <style:paragraph-properties fo:margin-left="0in" fo:margin-right="-0.5in" fo:line-height="80%" fo:text-align="center" style:justify-single-word="false" fo:text-indent="0in" style:auto-text-indent="false"/>
      <style:text-properties style:font-name="Times New Roman" fo:font-size="14pt" style:font-size-asian="14pt" style:font-name-complex="Times New Roman1" style:font-size-complex="14pt"/>
    </style:style>
    <style:style style:name="P14" style:family="paragraph" style:parent-style-name="Standard">
      <style:paragraph-properties fo:margin-left="0in" fo:margin-right="-0.5in" fo:line-height="80%" fo:text-indent="0in" style:auto-text-indent="false"/>
      <style:text-properties style:font-name="Times New Roman" fo:font-size="12pt" style:font-size-asian="12pt" style:font-name-complex="Times New Roman1" style:font-size-complex="12pt"/>
    </style:style>
    <style:style style:name="P15" style:family="paragraph" style:parent-style-name="List_20_Paragraph" style:list-style-name="WWNum1">
      <style:paragraph-properties fo:margin-left="-0.5083in" fo:margin-right="-0.5in" fo:line-height="80%" fo:text-indent="0in" style:auto-text-indent="false"/>
      <style:text-properties style:font-name="Times New Roman" fo:font-size="11pt" style:font-size-asian="11pt" style:font-name-complex="Times New Roman1" style:font-size-complex="11pt"/>
    </style:style>
    <style:style style:name="P16" style:family="paragraph" style:parent-style-name="List_20_Paragraph" style:list-style-name="WWNum1">
      <style:paragraph-properties fo:margin-left="-0.5083in" fo:margin-right="-0.5in" fo:line-height="80%" fo:text-align="justify" style:justify-single-word="false" fo:text-indent="0in" style:auto-text-indent="false"/>
      <style:text-properties style:font-name="Times New Roman" fo:font-size="11pt" style:font-size-asian="11pt" style:font-name-complex="Times New Roman1" style:font-size-complex="11pt"/>
    </style:style>
    <style:style style:name="P17" style:family="paragraph" style:parent-style-name="List_20_Paragraph" style:list-style-name="WWNum1">
      <style:paragraph-properties fo:margin-left="0in" fo:margin-right="-0.5in" fo:line-height="80%" fo:text-align="center" style:justify-single-word="false" fo:text-indent="0in" style:auto-text-indent="false"/>
      <style:text-properties style:font-name="Times New Roman" fo:font-size="11pt" style:font-size-asian="11pt" style:font-name-complex="Times New Roman1" style:font-size-complex="11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text-underline-style="none" fo:font-weight="normal" style:font-size-asian="12pt" style:font-weight-asian="normal" style:font-name-complex="Times New Roman1" style:font-size-complex="12pt" style:font-weight-complex="normal"/>
    </style:style>
    <style:style style:name="T5" style:family="text">
      <style:text-properties style:font-name="Times New Roman" fo:font-size="11pt" style:font-size-asian="11pt" style:font-name-complex="Times New Roman1" style:font-size-complex="11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oe Cazares Jr.</text:p>
      <text:p text:style-name="P7">3707 W Northgate Dr.</text:p>
      <text:p text:style-name="P7">Irving, Tx. 75062</text:p>
      <text:p text:style-name="P7">(254) 548-2178</text:p>
      <text:p text:style-name="P13"><text:span text:style-name="T6"/></text:p>
      <text:p text:style-name="P2">Objective</text:p>
      <text:p text:style-name="P14">A position in or related to the field with interest in securing a position with a good solid company that can utilize my welding skills and to achieve advancement and growth for the company.</text:p>
      <text:p text:style-name="P2"/>
      <text:p text:style-name="P2">Experience</text:p>
      <text:p text:style-name="P2"/>
      <text:list xml:id="list6187269582392148818" text:style-name="WWNum1">
        <text:list-item>
          <text:p text:style-name="P15">4 years’ experience as a skilled welder, some machining and machine operation.</text:p>
        </text:list-item>
        <text:list-item>
          <text:p text:style-name="P15">Profound knowledge of welding theory and principles.</text:p>
        </text:list-item>
        <text:list-item>
          <text:p text:style-name="P15">Skills in welding various types of metals (e.g., steel, aluminum, stainless steel), using different welding <text:s text:c="11"/><text:tab/>processes in all positions.</text:p>
        </text:list-item>
        <text:list-item>
          <text:p text:style-name="P15">Solid skills in use of hand and power tools.</text:p>
        </text:list-item>
        <text:list-item>
          <text:p text:style-name="P16">Ability to diagnose problems and determine appropriate action.</text:p>
          <text:p text:style-name="P17"><text:span text:style-name="T7">Work History</text:span></text:p>
        </text:list-item>
      </text:list>
      <text:p text:style-name="P12"><text:span text:style-name="T8">Siemens Energy – </text:span><text:span text:style-name="T9">Welder/Fitter</text:span></text:p>
      <text:p text:style-name="P10"><text:span text:style-name="T4">Lay out, position, align and fit together fabricated parts according to blueprints, schematics and sketches. Weld metal components and subassemblies together and inspect completed work for conformance to specifications. Safely operate overhead cranes, various hand tools and forklift. Maintain work area and equipment in a clean and orderly condition.</text:span></text:p>
      <text:p text:style-name="P10"><text:span text:style-name="T1">Caterpillar Inc. – </text:span><text:span text:style-name="T5">Manufacturing Specialist II (welder/machinist)</text:span></text:p>
      <text:p text:style-name="P5">Weld metal parts using GMAW spray welding process. Position work pieces and clamp together or assemble in jigs or fixtures. Inspect finished work piece for conformance to specifications. Repair broken or cracked parts. Operate overhead cranes to lift heavy industrial parts. </text:p>
      <text:p text:style-name="P6"><text:span text:style-name="T1">Pencco Inc. – </text:span><text:span text:style-name="T5">Plant Operator</text:span></text:p>
      <text:p text:style-name="P5">Perform quality control inspections at different phases of production. Made sure chemicals were mixed, heated, stored, and transported appropriately. Follow safety regulations and made sure finished products met quality standards. Performed walk troughs of facility to ensure equipment was clean and kept in proper working condition. Operate overhead crane, backhoe, and forklift.</text:p>
      <text:p text:style-name="P11"><text:span text:style-name="T5"/></text:p>
      <text:p text:style-name="P8">Education</text:p>
      <text:p text:style-name="P8"/>
      <text:p text:style-name="P6"><text:span text:style-name="T2">Texas State Technical College</text:span><text:span text:style-name="T3"> </text:span><text:span text:style-name="T2">Waco, Tx.</text:span></text:p>
      <text:p text:style-name="P4"/>
      <text:p text:style-name="P5">Associates Degree 2010-2012</text:p>
      <text:p text:style-name="P5"/>
      <text:p text:style-name="P4">Texas State Technical College Waco, Tx.</text:p>
      <text:p text:style-name="P4"/>
      <text:p text:style-name="P5">Welding Certificate 2009-2010</text:p>
      <text:p text:style-name="P5"/>
      <text:p text:style-name="P3"><text:tab/></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4T10:35:09.65</meta:creation-date>
    <dc:date>2014-12-23T21:13:04.46</dc:date>
    <meta:editing-duration>P1DT5H18M14S</meta:editing-duration>
    <meta:editing-cycles>5</meta:editing-cycles>
    <meta:generator>OpenOffice.org/3.4$Win32 OpenOffice.org_project/340m1$Build-9590</meta:generator>
    <meta:document-statistic meta:table-count="0" meta:image-count="0" meta:object-count="0" meta:page-count="2" meta:paragraph-count="25" meta:word-count="288" meta:character-count="1949"/>
  </office:meta>
</office:document-meta>
</file>