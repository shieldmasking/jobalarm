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3b36"/>
    </style:style>
    <style:style style:name="P2" style:family="paragraph" style:parent-style-name="Standard">
      <style:text-properties fo:font-size="10pt" officeooo:rsid="001a3b36" officeooo:paragraph-rsid="001a3b36" style:font-size-asian="10pt" style:font-size-complex="10pt"/>
    </style:style>
    <style:style style:name="P3" style:family="paragraph" style:parent-style-name="Standard">
      <style:text-properties fo:font-size="10pt" officeooo:rsid="001bc397" officeooo:paragraph-rsid="001bc397" style:font-size-asian="10pt" style:font-size-complex="10pt"/>
    </style:style>
    <style:style style:name="P4" style:family="paragraph" style:parent-style-name="Standard">
      <style:text-properties fo:font-size="10pt" officeooo:rsid="001c3749" officeooo:paragraph-rsid="001c3749" style:font-size-asian="10pt" style:font-size-complex="10pt"/>
    </style:style>
    <style:style style:name="P5" style:family="paragraph" style:parent-style-name="Standard">
      <style:text-properties fo:font-size="10pt" officeooo:rsid="001cce63" officeooo:paragraph-rsid="001cce63" style:font-size-asian="10pt" style:font-size-complex="10pt"/>
    </style:style>
    <style:style style:name="P6" style:family="paragraph" style:parent-style-name="Standard">
      <style:text-properties fo:font-size="10pt" officeooo:rsid="001cdf3a" officeooo:paragraph-rsid="001cdf3a" style:font-size-asian="10pt" style:font-size-complex="10pt"/>
    </style:style>
    <style:style style:name="P7" style:family="paragraph" style:parent-style-name="Standard">
      <style:text-properties fo:font-size="10pt" officeooo:rsid="001eb71c" officeooo:paragraph-rsid="001eb71c" style:font-size-asian="10pt" style:font-size-complex="10pt"/>
    </style:style>
    <style:style style:name="P8" style:family="paragraph" style:parent-style-name="Standard">
      <style:text-properties fo:font-size="10pt" officeooo:rsid="001eb77f" officeooo:paragraph-rsid="001eb77f" style:font-size-asian="10pt" style:font-size-complex="10pt"/>
    </style:style>
    <style:style style:name="T1" style:family="text">
      <style:text-properties officeooo:rsid="001903fe"/>
    </style:style>
    <style:style style:name="T2" style:family="text">
      <style:text-properties officeooo:rsid="001a3b36"/>
    </style:style>
    <style:style style:name="T3" style:family="text">
      <style:text-properties officeooo:rsid="001bc397"/>
    </style:style>
    <style:style style:name="T4" style:family="text">
      <style:text-properties officeooo:rsid="001cce63"/>
    </style:style>
    <style:style style:name="T5" style:family="text">
      <style:text-properties officeooo:rsid="001eb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 <text:s text:c="3"/><text:span text:style-name="T1">Glenn <text:s/>Owsley <text:s text:c="3"/></text:span></text:p>
      <text:p text:style-name="P1"><text:span text:style-name="T1"><text:tab/><text:tab/><text:tab/><text:tab/><text:tab/> <text:s text:c="3"/>1141 WEAVER STREET</text:span></text:p>
      <text:p text:style-name="P1"><text:s text:c="63"/><text:span text:style-name="T2">BANNING CA. 92220</text:span></text:p>
      <text:p text:style-name="P1"><text:s text:c="63"/><text:span text:style-name="T2">951-692-9751</text:span></text:p>
      <text:p text:style-name="P1"><text:s text:c="63"/><text:a xlink:type="simple" xlink:href="mailto:GLENN.OWSLEY@YAHOO.CO" text:style-name="Internet_20_link" text:visited-style-name="Visited_20_Internet_20_Link"><text:span text:style-name="T2">GLENN.OWSLEY@YAHOO.CO</text:span></text:a></text:p>
      <text:p text:style-name="P1"/>
      <text:p text:style-name="P1"/>
      <text:p text:style-name="P2">SUMMARY: <text:s/>HIGHLY MOTIVATED SELF-STARTER LOOKING FOR A CHANCE TO UTILIZE MY SKILLS AND TALENTS FOR A COMPANY THAT I CAN MAKE MY HOME. I AM A LOYAL</text:p>
      <text:p text:style-name="P2">, <text:span text:style-name="T3">HARD WORKING AND DEPENDABLE PERSON THAT WILL MAKE ME A VALUABLE ASSET TO ANY TEAM THAT WISHES TO SUCCEED IN BUSINESS. I HAVE BEEN IN THE</text:span></text:p>
      <text:p text:style-name="P3">TRANSPORT AND DELIVERY BUSINESS FOR 23 YEARS.</text:p>
      <text:p text:style-name="P3"/>
      <text:p text:style-name="P3"/>
      <text:p text:style-name="P3">EDUCATION: <text:s/>US ARMY COBAT ENGINEER AND DRIVER</text:p>
      <text:p text:style-name="P3"><text:s text:c="26"/>WAYNESVILLE HIGH SCHOOL</text:p>
      <text:p text:style-name="P3"/>
      <text:p text:style-name="P3">WORK EXPERIENCE</text:p>
      <text:p text:style-name="P3"/>
      <text:p text:style-name="P4">11-13 TO 8-14 <text:s text:c="3"/>LANDJET MOTOR CARRIER</text:p>
      <text:p text:style-name="P4"><text:s text:c="28"/>LONG HAUL DRIVE<text:span text:style-name="T4">R</text:span></text:p>
      <text:p text:style-name="P4"/>
      <text:p text:style-name="P5">12-11 TO 1-12 <text:s text:c="3"/>GEM STATE STAFFING</text:p>
      <text:p text:style-name="P5"><text:s text:c="28"/>PICK -UP &amp; DELIVERY</text:p>
      <text:p text:style-name="P5"/>
      <text:p text:style-name="P5">9-11 TO 11-11 <text:s text:c="3"/>TRIPLE ACE. INC.</text:p>
      <text:p text:style-name="P5"><text:s text:c="28"/>PICK-UP &amp; DELIVERY</text:p>
      <text:p text:style-name="P5"/>
      <text:p text:style-name="P5">7-11 TO 8-11 <text:s text:c="5"/>NORTH SIDE CANAL COMPANY</text:p>
      <text:p text:style-name="P5"><text:s text:c="27"/>WEED CUTTER</text:p>
      <text:p text:style-name="P5"/>
      <text:p text:style-name="P5">11-10 TO 5-11 <text:s text:c="3"/>J&amp;C CUSTOM L.L.C</text:p>
      <text:p text:style-name="P5"><text:s text:c="28"/>PICK-UP &amp; DELIVERY</text:p>
      <text:p text:style-name="P5"/>
      <text:p text:style-name="P5">5-10 TO 7-10 <text:s text:c="6"/>ENVIROCLEAN</text:p>
      <text:p text:style-name="P5"><text:s text:c="29"/>PICK-UP &amp; DELIVERY</text:p>
      <text:p text:style-name="P5"/>
      <text:p text:style-name="P6">3-10 TO 5-10 <text:s text:c="6"/>LABOR READY [ WORK FOR ENVIROCLEAN]</text:p>
      <text:p text:style-name="P6"><text:s text:c="29"/>PICK-UP &amp; DELIVERY</text:p>
      <text:p text:style-name="P6"/>
      <text:p text:style-name="P7">1-06 TO 11-06 <text:s text:c="5"/>LANDJET MOTOR CARRIER</text:p>
      <text:p text:style-name="P7"><text:s text:c="30"/>LONG HAUL DRIVER</text:p>
      <text:p text:style-name="P7"/>
      <text:p text:style-name="P7">8-99 TO 4-01 <text:s text:c="6"/>PACIFIC BUSINESS CONNECTIONS</text:p>
      <text:p text:style-name="P7"><text:s text:c="29"/>LONG HAUL DRIVER</text:p>
      <text:p text:style-name="P7"/>
      <text:p text:style-name="P7">5-77 TO 5-80 <text:s text:c="6"/>US ARMY</text:p>
      <text:p text:style-name="P7"><text:s text:c="29"/>COMBAT ENGINEER <text:s/><text:span text:style-name="T5">DROVE 5 TON &amp;10 TON DUMP TRUCK</text:span></text:p>
      <text:p text:style-name="P7"><text:s text:c="29"/><text:span text:style-name="T5">HONORABLE DISCHARGE</text:span></text:p>
      <text:p text:style-name="P7"/>
      <text:p text:style-name="P8">SKILLS: <text:s/>EXCELLENT ORGANIZATIONAL SKILLS, CDL LICENSE [WITH TANKER],AND GREAT PROBLEM</text:p>
      <text:p text:style-name="P8">SOLVING ABILITIES</text:p>
      <text:p text:style-name="P4"/>
      <text:p text:style-name="P1"><text:s text:c="65"/></text:p>
      <text:p text:style-name="P1"><text:span text:style-name="T1"><text:s text:c="18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3:35:28.701000000</meta:creation-date>
    <dc:date>2015-02-01T16:04:12.902000000</dc:date>
    <meta:editing-duration>PT11M47S</meta:editing-duration>
    <meta:editing-cycles>2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36" meta:word-count="194" meta:character-count="1985" meta:non-whitespace-character-count="977"/>
  </office:meta>
</office:document-meta>
</file>