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2pt" fo:font-weight="bold" style:font-size-asian="12pt" style:font-weight-asian="bold" style:font-name-complex="Times New Roman1" style:font-size-complex="12pt"/>
    </style:style>
    <style:style style:name="P3" style:family="paragraph" style:parent-style-name="List_20_Paragraph" style:list-style-name="WWNum1">
      <style:paragraph-properties fo:text-align="justify" style:justify-single-word="false"/>
      <style:text-properties style:font-name="Times New Roman" fo:font-size="12pt" style:font-size-asian="12pt" style:font-name-complex="Times New Roman1" style:font-size-complex="12pt"/>
    </style:style>
    <style:style style:name="P4" style:family="paragraph" style:parent-style-name="List_20_Paragraph" style:list-style-name="WWNum2">
      <style:paragraph-properties fo:text-align="justify" style:justify-single-word="false"/>
      <style:text-properties style:font-name="Times New Roman" fo:font-size="12pt" style:font-size-asian="12pt" style:font-name-complex="Times New Roman1" style:font-size-complex="12pt"/>
    </style:style>
    <style:style style:name="P5" style:family="paragraph" style:parent-style-name="List_20_Paragraph" style:list-style-name="WWNum5">
      <style:text-properties style:font-name="Times New Roman" fo:font-size="12pt" style:font-size-asian="12pt" style:font-name-complex="Times New Roman1" style:font-size-complex="12pt"/>
    </style:style>
    <style:style style:name="P6" style:family="paragraph" style:parent-style-name="Standard" style:master-page-name="Standard">
      <style:paragraph-properties fo:text-align="center" style:justify-single-word="false" style:page-number="auto"/>
      <style:text-properties style:font-name="Times New Roman" fo:font-size="12pt" fo:font-weight="bold" style:font-size-asian="12pt" style:font-weight-asian="bold" style:font-name-complex="Times New Roman1" style:font-size-complex="12pt"/>
    </style:style>
    <style:style style:name="P7" style:family="paragraph" style:parent-style-name="Standard">
      <style:text-properties style:font-name="Times New Roman" fo:font-size="12pt" fo:font-weight="bold" style:font-size-asian="12pt" style:font-weight-asian="bold" style:font-name-complex="Times New Roman1" style:font-size-complex="12pt"/>
    </style:style>
    <style:style style:name="P8"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9"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1" style:font-size-complex="12pt"/>
    </style:style>
    <style:style style:name="P10" style:family="paragraph" style:parent-style-name="Standard">
      <style:text-properties style:font-name="Times New Roman" fo:font-size="12pt" style:font-size-asian="12pt" style:font-name-complex="Times New Roman1" style:font-size-complex="12pt"/>
    </style:style>
    <style:style style:name="P11"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L1">
      <style:paragraph-properties fo:text-align="start" style:justify-single-word="false"/>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oseph Andrews <text:s text:c="122"/>102 Winchester road apt. c-9</text:p>
      <text:p text:style-name="P8">Cell: (334)-212-4633</text:p>
      <text:p text:style-name="P1"><text:span text:style-name="T2"><text:s/></text:span><text:a xlink:type="simple" xlink:href="mailto:josephandrews555@yahoo.com" text:style-name="Internet_20_link" text:visited-style-name="Visited_20_Internet_20_Link"><text:span text:style-name="T2">josephandrews555@yahoo.com</text:span></text:a></text:p>
      <text:p text:style-name="Standard"><text:span text:style-name="T2">Professional Summary: </text:span><text:span text:style-name="T1">Experienced Fabricator knowledgeable about general warehouse operations. Works quickly and stays focused under strict deadlines. I am a responsible and hardworking warehouse assembler who can collaborate with a team and produce quality work on tight deadlines. I’m comfortable with technology and industrial machinery. I learn new skills and processes quickly. I’m a dependable self-starter experienced in manufacturing production, assembly, quality assurance, and machine operation and maintenance. I’m also assembler skilled in managing multiple tasks with frequency changing priorities. While working I’m able to continuously project a positive attitude.</text:span></text:p>
      <text:p text:style-name="Standard"><text:span text:style-name="T2">Skills:</text:span><text:span text:style-name="T1"> </text:span></text:p>
      <text:list xml:id="list1875267301880888104" text:style-name="WWNum1">
        <text:list-item>
          <text:p text:style-name="P3">Small parts assembly </text:p>
        </text:list-item>
        <text:list-item>
          <text:p text:style-name="P3">Fast learner</text:p>
        </text:list-item>
        <text:list-item>
          <text:p text:style-name="P3">Highly dependable</text:p>
        </text:list-item>
        <text:list-item>
          <text:p text:style-name="P3">Pay excellent attention to detail</text:p>
        </text:list-item>
        <text:list-item>
          <text:p text:style-name="P3">Skilled in final assembly processes </text:p>
        </text:list-item>
        <text:list-item>
          <text:p text:style-name="P3">Certified forklift operator </text:p>
        </text:list-item>
        <text:list-item>
          <text:p text:style-name="P3">Know how to use pneumatic tools</text:p>
        </text:list-item>
        <text:list-item>
          <text:p text:style-name="P3">Maintenance of shop equipment</text:p>
        </text:list-item>
        <text:list-item>
          <text:p text:style-name="P3">Qualified in blueprint interpretation</text:p>
        </text:list-item>
      </text:list>
      <text:p text:style-name="P9">Work History:</text:p>
      <text:p text:style-name="P11">Saw Operator 02/2011-09/2012</text:p>
      <text:p text:style-name="P11">Pallet One- Selma, Al.</text:p>
      <text:list xml:id="list1137971488532663192" text:style-name="WWNum2">
        <text:list-item>
          <text:p text:style-name="P4">Received and correctly processed both written and verbal instructions, prints, and work orders.</text:p>
        </text:list-item>
        <text:list-item>
          <text:p text:style-name="P4">Obtained appropriate tooling and fixtures.</text:p>
        </text:list-item>
        <text:list-item>
          <text:p text:style-name="P4"><text:soft-page-break/>Made and revised set ups on test strands previously calibrated by other staff.</text:p>
        </text:list-item>
        <text:list-item>
          <text:p text:style-name="P4">Inspected and tested components, assemblies, and power tools.</text:p>
        </text:list-item>
        <text:list-item>
          <text:p text:style-name="P4">Disassembled, reassembled, and corrected changeover. </text:p>
        </text:list-item>
      </text:list>
      <text:p text:style-name="P11">Delivery Driver 08/1999- present</text:p>
      <text:p text:style-name="P10">Larry Walters Furniture- Demopolis, Al</text:p>
      <text:list xml:id="list3100462867499321297" text:style-name="WWNum5">
        <text:list-item>
          <text:p text:style-name="P5">Repainted and precisely touched-up components and assemblies.</text:p>
        </text:list-item>
        <text:list-item>
          <text:p text:style-name="P5">Recognized and reported defective material and equipment to shift supervisor.</text:p>
        </text:list-item>
        <text:list-item>
          <text:p text:style-name="P5">Take inventory on all items received.</text:p>
        </text:list-item>
        <text:list-item>
          <text:p text:style-name="P5">Repair and assemble furniture.</text:p>
        </text:list-item>
        <text:list-item>
          <text:p text:style-name="P5">Deliver furniture for all the company stores.</text:p>
        </text:list-item>
      </text:list>
      <text:p text:style-name="P2">Education</text:p>
      <text:p text:style-name="P10">J.F. Ingram State Technical College- Columbiana, Al</text:p>
      <text:p text:style-name="P10">March 2010</text:p>
      <text:p text:style-name="P10">Forklift operations/upholstery/core safety</text:p>
      <text:p text:style-name="P2">plumbing</text:p>
      <text:p text:style-name="P11"><text:s text:c="78"/><text:tab/><text:tab/><text:tab/><text:tab/><text:tab/><text:tab/><text:tab/><text:tab/><text:tab/><text:tab/><text:tab/><text:tab/><text:tab/><text:tab/><text:tab/><text:tab/><text:tab/><text:tab/><text:tab/><text:tab/><text:tab/><text:tab/><text:tab/> <text:s text:c="58"/></text:p>
      <text:list xml:id="list6594954289679202387" text:style-name="L1">
        <text:list-item>
          <text:p text:style-name="P12"><text:span text:style-name="T3">WORK HISTORY </text:span></text:p>
        </text:list-item>
        <text:list-item>
          <text:p text:style-name="P13"><text:span text:style-name="T1"><text:s/>Coast Personell/Toyota <text:s text:c="7"/>assembling car engines from 8/14 to 12/14 </text:span></text:p>
        </text:list-item>
        <text:list-item>
          <text:p text:style-name="P13"><text:span text:style-name="T1"><text:tab/>Handy <text:s/>Van /non emergency transportation company<text:tab/><text:tab/><text:tab/><text:tab/>from 3/96 to 7/99<text:tab/><text:tab/><text:tab/><text:tab/><text:tab/><text:tab/><text:tab/><text:tab/> <text:s text:c="12"/>duties: transport elderly clients from their homes , or the hospital,or doctors appointments back home or to wherever they needed togo.Whether they were in a wheelchair or on a strecher. <text:s text:c="8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ETiA</meta:initial-creator>
    <meta:editing-cycles>5</meta:editing-cycles>
    <meta:creation-date>2013-11-16T01:29:00</meta:creation-date>
    <dc:date>2015-01-08T13:33:37.12</dc:date>
    <meta:editing-duration>P1DT20H34M</meta:editing-duration>
    <meta:generator>OpenOffice/4.1.1$Win32 OpenOffice.org_project/411m6$Build-9775</meta:generator>
    <meta:document-statistic meta:table-count="0" meta:image-count="0" meta:object-count="0" meta:page-count="2" meta:paragraph-count="38" meta:word-count="317" meta:character-count="2608"/>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